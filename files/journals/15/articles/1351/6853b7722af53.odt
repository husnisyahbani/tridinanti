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3000001B4D7107718.jpg" manifest:media-type="image/jpeg"/>
  <manifest:file-entry manifest:full-path="Pictures/1000000000000128000001A126FAC7AC.jpg" manifest:media-type="image/jpeg"/>
  <manifest:file-entry manifest:full-path="Pictures/10000000000001430000019DB2900BAF.jpg" manifest:media-type="image/jpeg"/>
  <manifest:file-entry manifest:full-path="Pictures/1000000000000125000001AA3E2D7617.jpg" manifest:media-type="image/jpeg"/>
  <manifest:file-entry manifest:full-path="Pictures/1000000000000143000001A804BB67D5.jpg" manifest:media-type="image/jpeg"/>
  <manifest:file-entry manifest:full-path="Pictures/100000000000011F0000015F5AF6AA15.jpg" manifest:media-type="image/jpeg"/>
  <manifest:file-entry manifest:full-path="Pictures/100000000000012100000167BB45D2DA.jpg" manifest:media-type="image/jpeg"/>
  <manifest:file-entry manifest:full-path="Pictures/100000000000013A0000010AB0F1B9D1.jpg" manifest:media-type="image/jpeg"/>
  <manifest:file-entry manifest:full-path="Pictures/10000000000001130000010DD13B0A4B.jpg" manifest:media-type="image/jpeg"/>
  <manifest:file-entry manifest:full-path="Pictures/1000000100000085000000828FE9FC1F.png" manifest:media-type="image/png"/>
  <manifest:file-entry manifest:full-path="Pictures/10000000000001450000018A6F36F89B.jpg" manifest:media-type="image/jpeg"/>
  <manifest:file-entry manifest:full-path="Pictures/1000000000000161000001203254BE53.jpg" manifest:media-type="image/jpeg"/>
  <manifest:file-entry manifest:full-path="Pictures/100000000000014200000127E4EB1971.jpg" manifest:media-type="image/jpeg"/>
  <manifest:file-entry manifest:full-path="Pictures/1000000000000126000001528B525AF7.jpg" manifest:media-type="image/jpeg"/>
  <manifest:file-entry manifest:full-path="Pictures/10000000000001380000015EF0A5A324.jpg" manifest:media-type="image/jpeg"/>
  <manifest:file-entry manifest:full-path="Pictures/1000000100000A5100000190D6E17FD2.png" manifest:media-type="image/png"/>
  <manifest:file-entry manifest:full-path="Pictures/100000000000013B00000132BA2E5304.jpg" manifest:media-type="image/jpeg"/>
  <manifest:file-entry manifest:full-path="Pictures/100000000000013800000161158413C7.jpg" manifest:media-type="image/jpeg"/>
  <manifest:file-entry manifest:full-path="Pictures/100000000000013800000151DCBE648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ngXian" svg:font-family="DengXian"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nion Pro" svg:font-family="'Minion Pro'" style:font-family-generic="system" style:font-pitch="variable"/>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4757in" fo:margin-left="0.0104in" fo:margin-top="0in" fo:margin-bottom="0in" table:align="left" style:writing-mode="lr-tb"/>
    </style:style>
    <style:style style:name="Table1.A" style:family="table-column">
      <style:table-column-properties style:column-width="1.8632in"/>
    </style:style>
    <style:style style:name="Table1.B" style:family="table-column">
      <style:table-column-properties style:column-width="4.6118in"/>
    </style:style>
    <style:style style:name="Table1.1" style:family="table-row">
      <style:table-row-properties fo:keep-together="auto"/>
    </style:style>
    <style:style style:name="Table1.A1" style:family="table-cell">
      <style:table-cell-properties fo:background-color="#ffffff" style:border-line-width-left="0.0069in 0.0069in 0.0069in" fo:padding-left="0.075in" fo:padding-right="0.075in" fo:padding-top="0in" fo:padding-bottom="0in" fo:border-left="1.5pt double #4f81bd" fo:border-right="none" fo:border-top="none" fo:border-bottom="1.5pt solid #95b3d7" style:writing-mode="lr-tb">
        <style:background-image/>
      </style:table-cell-properties>
    </style:style>
    <style:style style:name="Table1.B1" style:family="table-cell">
      <style:table-cell-properties fo:background-color="#ffffff" style:border-line-width-right="0.0069in 0.0069in 0.0069in" fo:padding-left="0.075in" fo:padding-right="0.075in" fo:padding-top="0in" fo:padding-bottom="0in" fo:border-left="none" fo:border-right="1.5pt double #4f81bd" fo:border-top="none" fo:border-bottom="1.5pt solid #95b3d7" style:writing-mode="lr-tb">
        <style:background-image/>
      </style:table-cell-properties>
    </style:style>
    <style:style style:name="Table1.A2" style:family="table-cell">
      <style:table-cell-properties fo:background-color="#dbe5f1" style:border-line-width="0.0069in 0.0069in 0.0069in" fo:padding-left="0.075in" fo:padding-right="0.075in" fo:padding-top="0in" fo:padding-bottom="0in" fo:border="1.5pt double #4f81bd" style:writing-mode="lr-tb">
        <style:background-image/>
      </style:table-cell-properties>
    </style:style>
    <style:style style:name="Table1.A3" style:family="table-cell">
      <style:table-cell-properties style:border-line-width="0.0069in 0.0069in 0.0069in" fo:padding-left="0.075in" fo:padding-right="0.075in" fo:padding-top="0in" fo:padding-bottom="0in" fo:border="1.5pt double #4f81bd" style:writing-mode="lr-tb"/>
    </style:style>
    <style:style style:name="Table1.B3" style:family="table-cell">
      <style:table-cell-properties style:border-line-width="0.0069in 0.0069in 0.0069in" fo:padding-left="0.075in" fo:padding-right="0.075in" fo:padding-top="0in" fo:padding-bottom="0in" fo:border="1.5pt double #4f81bd" style:writing-mode="lr-tb"/>
    </style:style>
    <style:style style:name="P1" style:family="paragraph" style:parent-style-name="Text_20_body">
      <style:paragraph-properties fo:margin-top="0.0043in" fo:margin-bottom="0in" style:contextual-spacing="false"/>
      <style:text-properties fo:font-size="9pt" style:font-size-asian="9pt"/>
    </style:style>
    <style:style style:name="P2" style:family="paragraph" style:parent-style-name="Title">
      <style:paragraph-properties fo:margin-left="0.3744in" fo:margin-right="0.0984in" fo:margin-top="0in" fo:margin-bottom="0in" style:contextual-spacing="false" style:snap-to-layout-grid="false"/>
    </style:style>
    <style:style style:name="P3" style:family="paragraph" style:parent-style-name="Standard">
      <style:paragraph-properties fo:margin-left="0.3717in" fo:margin-right="-0.0008in" fo:margin-top="0.1047in" fo:margin-bottom="0in" style:contextual-spacing="false"/>
    </style:style>
    <style:style style:name="P4" style:family="paragraph">
      <loext:graphic-properties draw:fill="none"/>
      <style:paragraph-properties fo:text-align="start"/>
      <style:text-properties fo:font-size="18pt"/>
    </style:style>
    <style:style style:name="P5" style:family="paragraph" style:parent-style-name="Text_20_body">
      <style:text-properties fo:font-size="10pt" fo:font-weight="bold" style:font-size-asian="10pt" style:font-weight-asian="bold"/>
    </style:style>
    <style:style style:name="P6" style:family="paragraph" style:parent-style-name="Text_20_body">
      <style:paragraph-properties fo:margin-top="0.0008in" fo:margin-bottom="0in" style:contextual-spacing="false"/>
      <style:text-properties fo:font-weight="bold" style:font-weight-asian="bold"/>
    </style:style>
    <style:style style:name="P7" style:family="paragraph" style:parent-style-name="Standard">
      <style:paragraph-properties fo:margin-left="0.2957in" fo:margin-right="0.3291in" fo:text-align="center" style:justify-single-word="false" style:snap-to-layout-grid="false"/>
    </style:style>
    <style:style style:name="P8" style:family="paragraph" style:parent-style-name="Standard">
      <style:paragraph-properties fo:margin-left="0.1972in" fo:margin-right="0.2307in" fo:text-align="center" style:justify-single-word="false" style:snap-to-layout-grid="false"/>
      <style:text-properties fo:font-size="14pt" fo:font-weight="bold" style:font-size-asian="14pt" style:font-weight-asian="bold"/>
    </style:style>
    <style:style style:name="P9" style:family="paragraph" style:parent-style-name="Text_20_body">
      <style:paragraph-properties style:snap-to-layout-grid="false"/>
      <style:text-properties fo:font-size="8.5pt" fo:font-weight="bold" style:font-size-asian="8.5pt" style:font-weight-asian="bold"/>
    </style:style>
    <style:style style:name="P10" style:family="paragraph" style:parent-style-name="Standard">
      <style:paragraph-properties fo:margin-left="0.5028in" fo:margin-right="0.4425in" fo:text-align="center" style:justify-single-word="false" style:snap-to-layout-grid="false"/>
    </style:style>
    <style:style style:name="P11" style:family="paragraph" style:parent-style-name="Standard">
      <style:paragraph-properties fo:margin-left="0.5028in" fo:margin-right="0.4425in" fo:text-align="center" style:justify-single-word="false" style:snap-to-layout-grid="false"/>
      <style:text-properties fo:font-size="5pt" fo:language="en" fo:country="US" fo:font-weight="bold" style:font-size-asian="5pt" style:font-weight-asian="bold" style:font-size-complex="5pt"/>
    </style:style>
    <style:style style:name="P12" style:family="paragraph" style:parent-style-name="Standard">
      <style:paragraph-properties fo:margin-left="0.5043in" fo:margin-right="0.1984in" fo:text-align="center" style:justify-single-word="false" style:snap-to-layout-grid="false"/>
    </style:style>
    <style:style style:name="P13" style:family="paragraph" style:parent-style-name="Standard">
      <style:paragraph-properties fo:margin-left="1.8591in" fo:margin-right="1.8555in" fo:text-align="center" style:justify-single-word="false" style:snap-to-layout-grid="false"/>
      <style:text-properties fo:font-size="9pt" style:font-size-asian="9pt"/>
    </style:style>
    <style:style style:name="P14" style:family="paragraph" style:parent-style-name="Standard">
      <style:paragraph-properties fo:margin-left="1.8591in" fo:margin-right="1.8555in" fo:text-align="center" style:justify-single-word="false" style:snap-to-layout-grid="false"/>
    </style:style>
    <style:style style:name="P15" style:family="paragraph" style:parent-style-name="Text_20_body">
      <style:paragraph-properties style:snap-to-layout-grid="false"/>
      <style:text-properties style:font-name="Calibri1" fo:font-size="10pt" style:font-size-asian="10pt"/>
    </style:style>
    <style:style style:name="P16" style:family="paragraph" style:parent-style-name="Text_20_body">
      <style:paragraph-properties fo:margin-top="0.0008in" fo:margin-bottom="0in" style:contextual-spacing="false"/>
      <style:text-properties style:font-name="Calibri1" fo:font-size="5pt" style:font-size-asian="5pt" style:font-size-complex="7pt"/>
    </style:style>
    <style:style style:name="P17" style:family="paragraph" style:parent-style-name="Text_20_body">
      <style:paragraph-properties fo:margin-right="0.139in" fo:margin-top="0in" fo:margin-bottom="0in" style:contextual-spacing="false" fo:text-align="start" style:justify-single-word="false" fo:orphans="0" fo:widows="0" style:snap-to-layout-grid="false"/>
      <style:text-properties fo:font-weight="bold" style:letter-kerning="false" style:language-asian="en" style:country-asian="US" style:font-weight-asian="bold" style:language-complex="ar" style:country-complex="SA" style:font-weight-complex="bold"/>
    </style:style>
    <style:style style:name="P18" style:family="paragraph" style:parent-style-name="Text_20_body">
      <style:paragraph-properties fo:margin-top="0in" fo:margin-bottom="0in" style:contextual-spacing="false" fo:text-align="center" style:justify-single-word="false" fo:orphans="0" fo:widows="0" style:snap-to-layout-grid="false"/>
      <style:text-properties fo:font-weight="bold" style:letter-kerning="false" style:language-asian="en" style:country-asian="US" style:font-weight-asian="bold" style:language-complex="ar" style:country-complex="SA" style:font-weight-complex="bold"/>
    </style:style>
    <style:style style:name="P19" style:family="paragraph" style:parent-style-name="Text_20_body">
      <style:paragraph-properties fo:margin-top="0in" fo:margin-bottom="0in" style:contextual-spacing="false" fo:text-align="start" style:justify-single-word="false" fo:orphans="0" fo:widows="0" style:snap-to-layout-grid="false"/>
      <style:text-properties fo:font-weight="bold" style:letter-kerning="false" style:language-asian="en" style:country-asian="US" style:font-weight-asian="bold" style:language-complex="ar" style:country-complex="SA" style:font-weight-complex="bold"/>
    </style:style>
    <style:style style:name="P20" style:family="paragraph" style:parent-style-name="Standard">
      <style:paragraph-properties fo:margin-left="0.0008in" fo:margin-right="0.098in" fo:margin-top="0.0035in" fo:margin-bottom="0in" style:contextual-spacing="false" fo:line-height="103%" fo:text-align="justify" style:justify-single-word="false" fo:orphans="0" fo:widows="0"/>
      <style:text-properties fo:font-size="11pt" style:letter-kerning="false" style:font-size-asian="11pt" style:language-asian="en" style:country-asian="US" style:font-size-complex="11pt" style:language-complex="ar" style:country-complex="SA"/>
    </style:style>
    <style:style style:name="P21" style:family="paragraph" style:parent-style-name="Text_20_body">
      <style:paragraph-properties fo:margin-top="0in" fo:margin-bottom="0in" style:contextual-spacing="false" fo:text-align="start" style:justify-single-word="false" fo:orphans="0" fo:widows="0" style:snap-to-layout-grid="false"/>
      <style:text-properties style:font-name="Calibri1" fo:font-size="9pt" style:letter-kerning="false" style:font-size-asian="9pt" style:language-asian="en" style:country-asian="US" style:language-complex="ar" style:country-complex="SA"/>
    </style:style>
    <style:style style:name="P22" style:family="paragraph" style:parent-style-name="Text_20_body">
      <style:paragraph-properties fo:margin-top="0in" fo:margin-bottom="0in" style:contextual-spacing="false" fo:text-align="start" style:justify-single-word="false" fo:orphans="0" fo:widows="0" style:snap-to-layout-grid="false"/>
      <style:text-properties style:font-name="Calibri1" fo:font-size="10pt" style:text-underline-style="solid" style:text-underline-width="auto" style:text-underline-color="font-color" fo:font-weight="bold" style:letter-kerning="false" style:font-size-asian="10pt" style:language-asian="en" style:country-asian="US" style:font-weight-asian="bold" style:language-complex="ar" style:country-complex="SA" style:font-weight-complex="bold"/>
    </style:style>
    <style:style style:name="P23" style:family="paragraph" style:parent-style-name="Text_20_body">
      <style:paragraph-properties fo:margin-top="0in" fo:margin-bottom="0in" style:contextual-spacing="false" fo:text-align="center" style:justify-single-word="false" fo:orphans="0" fo:widows="0" style:snap-to-layout-grid="false"/>
      <style:text-properties style:letter-kerning="false" style:language-asian="en" style:country-asian="US" style:language-complex="ar" style:country-complex="SA"/>
    </style:style>
    <style:style style:name="P24" style:family="paragraph" style:parent-style-name="Text_20_body">
      <style:paragraph-properties fo:margin-top="0in" fo:margin-bottom="0in" style:contextual-spacing="false" fo:text-align="justify" style:justify-single-word="false" fo:orphans="0" fo:widows="0" style:snap-to-layout-grid="false"/>
      <style:text-properties style:letter-kerning="false" style:language-asian="en" style:country-asian="US" style:language-complex="ar" style:country-complex="SA"/>
    </style:style>
    <style:style style:name="P25" style:family="paragraph" style:parent-style-name="Text_20_body">
      <style:paragraph-properties fo:margin-top="0in" fo:margin-bottom="0in" style:contextual-spacing="false" fo:text-align="start" style:justify-single-word="false" fo:orphans="0" fo:widows="0" style:snap-to-layout-grid="false"/>
      <style:text-properties style:font-name="Calibri1" fo:font-size="10pt" style:letter-kerning="false" style:font-size-asian="10pt" style:language-asian="en" style:country-asian="US" style:language-complex="ar" style:country-complex="SA"/>
    </style:style>
    <style:style style:name="P26" style:family="paragraph" style:parent-style-name="Text_20_body">
      <style:paragraph-properties fo:margin-top="0.0008in" fo:margin-bottom="0in" style:contextual-spacing="false"/>
      <style:text-properties style:font-name="Calibri1" fo:font-size="10pt" style:font-size-asian="10pt"/>
    </style:style>
    <style:style style:name="P27" style:family="paragraph" style:parent-style-name="Standard">
      <style:text-properties fo:font-weight="bold" style:font-weight-asian="bold"/>
    </style:style>
    <style:style style:name="P28" style:family="paragraph" style:parent-style-name="Standard">
      <style:paragraph-properties style:snap-to-layout-grid="false"/>
    </style:style>
    <style:style style:name="P29" style:family="paragraph" style:parent-style-name="Text_20_body">
      <style:paragraph-properties fo:margin-right="0.0937in" fo:line-height="103%" fo:text-align="justify" style:justify-single-word="false"/>
    </style:style>
    <style:style style:name="P30" style:family="paragraph" style:parent-style-name="Text_20_body">
      <style:paragraph-properties style:snap-to-layout-grid="false"/>
      <style:text-properties fo:font-size="11pt" style:font-size-asian="11pt" style:font-size-complex="11pt"/>
    </style:style>
    <style:style style:name="P31" style:family="paragraph" style:parent-style-name="Para">
      <style:paragraph-properties fo:margin-top="0in" fo:margin-bottom="0in" style:contextual-spacing="false" fo:line-height="100%" fo:text-indent="0in" style:auto-text-indent="false"/>
    </style:style>
    <style:style style:name="P32" style:family="paragraph" style:parent-style-name="Para">
      <style:paragraph-properties fo:margin-top="0in" fo:margin-bottom="0in" style:contextual-spacing="false" fo:line-height="100%" fo:text-indent="0in" style:auto-text-indent="false"/>
      <style:text-properties fo:font-size="11pt" style:font-size-asian="11pt" style:font-size-complex="11pt"/>
    </style:style>
    <style:style style:name="P33" style:family="paragraph" style:parent-style-name="Text_20_body">
      <style:paragraph-properties fo:margin-right="-0.0008in" fo:text-align="justify" style:justify-single-word="false" style:snap-to-layout-grid="false"/>
      <style:text-properties fo:font-size="11pt" fo:language="en" fo:country="US" style:font-size-asian="11pt" style:font-size-complex="11pt"/>
    </style:style>
    <style:style style:name="P34" style:family="paragraph" style:parent-style-name="Text_20_body">
      <style:paragraph-properties fo:text-align="justify" style:justify-single-word="false" style:snap-to-layout-grid="false"/>
      <style:text-properties fo:font-size="11pt" style:font-size-asian="11pt" style:font-size-complex="11pt"/>
    </style:style>
    <style:style style:name="P35" style:family="paragraph" style:parent-style-name="Standard">
      <style:paragraph-properties fo:text-align="justify" style:justify-single-word="false" style:snap-to-layout-grid="false"/>
    </style:style>
    <style:style style:name="P36" style:family="paragraph" style:parent-style-name="JRM_5f_Bodytext" style:list-style-name="WWNum1"/>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JRM_5f_Bodytext">
      <style:paragraph-properties fo:text-align="center" style:justify-single-word="false"/>
    </style:style>
    <style:style style:name="P41" style:family="paragraph" style:parent-style-name="Standard">
      <style:paragraph-properties fo:text-align="justify" style:justify-single-word="false" style:snap-to-layout-grid="false"/>
      <style:text-properties fo:font-weight="bold" style:font-weight-asian="bold"/>
    </style:style>
    <style:style style:name="P42" style:family="paragraph" style:parent-style-name="JRM_5f_Bodytext" style:list-style-name="WWNum3"/>
    <style:style style:name="P43" style:family="paragraph" style:parent-style-name="JRM_5f_Bodytext" style:list-style-name="WWNum2"/>
    <style:style style:name="P44" style:family="paragraph" style:parent-style-name="Standard">
      <style:paragraph-properties style:snap-to-layout-grid="false"/>
      <style:text-properties fo:font-size="12pt" fo:font-weight="bold" style:font-size-asian="12pt" style:font-weight-asian="bold" style:font-size-complex="12pt"/>
    </style:style>
    <style:style style:name="P45" style:family="paragraph" style:parent-style-name="Standard">
      <style:paragraph-properties style:snap-to-layout-grid="false"/>
      <style:text-properties fo:language="en" fo:country="US"/>
    </style:style>
    <style:style style:name="P46" style:family="paragraph" style:parent-style-name="Text_20_body">
      <style:paragraph-properties fo:margin-left="0.5008in" fo:margin-top="0.002in" fo:margin-bottom="0in" style:contextual-spacing="false" fo:line-height="102%" fo:text-align="justify" style:justify-single-word="false" fo:text-indent="-0.5in" style:auto-text-indent="false"/>
    </style:style>
    <style:style style:name="P47" style:family="paragraph" style:parent-style-name="Standard">
      <style:paragraph-properties fo:margin-left="0.4445in" fo:text-align="justify" style:justify-single-word="false" fo:text-indent="-0.4445in" style:auto-text-indent="false"/>
      <style:text-properties fo:font-size="10pt" style:font-size-asian="10pt" style:font-size-complex="10pt"/>
    </style:style>
    <style:style style:name="P48" style:family="paragraph" style:parent-style-name="Standard">
      <style:paragraph-properties fo:margin-left="0.4445in" fo:text-align="justify" style:justify-single-word="false" fo:text-indent="-0.4445in" style:auto-text-indent="false"/>
    </style:style>
    <style:style style:name="P49" style:family="paragraph" style:parent-style-name="Text_20_body">
      <style:paragraph-properties fo:text-align="justify" style:justify-single-word="false" style:snap-to-layout-grid="false"/>
    </style:style>
    <style:style style:name="P50" style:family="paragraph" style:parent-style-name="Standard">
      <style:paragraph-properties fo:margin-right="0.2047in" fo:line-height="115%" fo:text-align="justify" style:justify-single-word="false"/>
      <style:text-properties fo:language="en" fo:country="US"/>
    </style:style>
    <style:style style:name="P51" style:family="paragraph" style:parent-style-name="Frame_20_contents">
      <style:paragraph-properties fo:line-height="150%" fo:text-align="end" style:justify-single-word="false"/>
    </style:style>
    <style:style style:name="P52" style:family="paragraph" style:parent-style-name="Frame_20_contents">
      <style:paragraph-properties fo:line-height="150%" fo:text-align="end" style:justify-single-word="false"/>
      <style:text-properties fo:color="#000000" loext:opacity="100%" style:font-name="Arial" fo:font-size="8pt" fo:font-style="italic" fo:font-weight="bold" style:font-size-asian="8pt" style:font-style-asian="italic" style:font-weight-asian="bold" style:font-name-complex="Arial1" style:font-size-complex="8pt" style:font-style-complex="italic" style:font-weight-complex="bold">
        <loext:char-complex-color loext:theme-type="dark1" loext:color-type="theme"/>
      </style:text-properties>
    </style:style>
    <style:style style:name="P53" style:family="paragraph">
      <loext:graphic-properties draw:fill="none"/>
      <style:paragraph-properties fo:text-align="start"/>
      <style:text-properties fo:color="#ffffff" loext:opacity="100%" fo:font-size="18pt"/>
    </style:style>
    <style:style style:name="T1" style:family="text">
      <style:text-properties fo:font-size="9pt" style:font-size-asian="9pt"/>
    </style:style>
    <style:style style:name="T2" style:family="text">
      <style:text-properties fo:font-size="14pt" fo:language="en" fo:country="US" style:font-size-asian="14pt" style:font-size-complex="14pt"/>
    </style:style>
    <style:style style:name="T3" style:family="text">
      <style:text-properties fo:font-size="12pt" style:font-size-asian="12pt" style:font-size-complex="12pt"/>
    </style:style>
    <style:style style:name="T4" style:family="text">
      <style:text-properties fo:font-size="12pt" fo:letter-spacing="-0.0008in" style:font-size-asian="12pt" style:font-size-complex="12pt"/>
    </style:style>
    <style:style style:name="T5" style:family="text">
      <style:text-properties fo:font-size="14pt" style:font-size-asian="14pt" style:font-size-complex="14pt"/>
    </style:style>
    <style:style style:name="T6" style:family="text">
      <style:text-properties fo:font-size="14pt" fo:letter-spacing="-0.0016in" style:font-size-asian="14pt" style:font-size-complex="14pt"/>
    </style:style>
    <style:style style:name="T7" style:family="text">
      <style:text-properties fo:font-size="14pt" fo:letter-spacing="-0.0016in" fo:language="en" fo:country="US" style:font-size-asian="14pt" style:font-size-complex="14pt"/>
    </style:style>
    <style:style style:name="T8" style:family="text">
      <style:text-properties fo:language="en" fo:country="US" fo:font-weight="bold" style:font-weight-asian="bold"/>
    </style:style>
    <style:style style:name="T9" style:family="text">
      <style:text-properties fo:font-weight="bold" style:font-weight-asian="bold"/>
    </style:style>
    <style:style style:name="T10" style:family="text">
      <style:text-properties fo:letter-spacing="-0.0035in" fo:font-weight="bold" style:font-weight-asian="bold"/>
    </style:style>
    <style:style style:name="T11" style:family="text">
      <style:text-properties fo:letter-spacing="-0.0016in" fo:font-weight="bold" style:font-weight-asian="bold"/>
    </style:style>
    <style:style style:name="T12" style:family="text">
      <style:text-properties fo:letter-spacing="-0.002in" fo:font-weight="bold" style:font-weight-asian="bold"/>
    </style:style>
    <style:style style:name="T13" style:family="text">
      <style:text-properties fo:font-size="10pt" fo:font-weight="bold" style:font-size-asian="10pt" style:font-weight-asian="bold"/>
    </style:style>
    <style:style style:name="T14" style:family="text">
      <style:text-properties fo:font-size="14pt" fo:language="en" fo:country="US" fo:font-weight="bold" style:font-size-asian="14pt" style:font-weight-asian="bold"/>
    </style:style>
    <style:style style:name="T15" style:family="text">
      <style:text-properties fo:font-size="14pt" fo:font-weight="bold" style:font-size-asian="14pt" style:font-weight-asian="bold"/>
    </style:style>
    <style:style style:name="T16" style:family="text">
      <style:text-properties fo:font-size="8.5pt" fo:font-weight="bold" style:font-size-asian="8.5pt" style:font-weight-asian="bold"/>
    </style:style>
    <style:style style:name="T17" style:family="text">
      <style:text-properties fo:font-size="10pt" fo:language="en" fo:country="US" fo:font-weight="bold" style:font-size-asian="10pt" style:font-weight-asian="bold" style:font-size-complex="10pt"/>
    </style:style>
    <style:style style:name="T18" style:family="text">
      <style:text-properties style:text-position="super 58%" fo:font-size="10pt" fo:language="en" fo:country="US" fo:font-weight="bold" style:font-size-asian="10pt" style:font-weight-asian="bold" style:font-size-complex="10pt"/>
    </style:style>
    <style:style style:name="T19" style:family="text">
      <style:text-properties fo:font-size="5pt" fo:language="en" fo:country="US" fo:font-weight="bold" style:font-size-asian="5pt" style:font-weight-asian="bold" style:font-size-complex="5pt"/>
    </style:style>
    <style:style style:name="T20" style:family="text">
      <style:text-properties fo:font-size="9pt" fo:language="en" fo:country="US" style:font-size-asian="9pt"/>
    </style:style>
    <style:style style:name="T21" style:family="text">
      <style:text-properties style:text-position="super 58%" fo:font-size="9pt" fo:letter-spacing="-0.0008in" style:font-size-asian="9pt"/>
    </style:style>
    <style:style style:name="T22" style:family="text">
      <style:text-properties fo:font-size="9pt" fo:letter-spacing="-0.0091in" style:font-size-asian="9pt"/>
    </style:style>
    <style:style style:name="T23" style:family="text">
      <style:text-properties fo:font-size="9pt" fo:letter-spacing="-0.0008in" fo:language="en" fo:country="US" style:font-size-asian="9pt"/>
    </style:style>
    <style:style style:name="T24" style:family="text">
      <style:text-properties style:text-position="super 58%" fo:font-size="9pt" fo:letter-spacing="-0.0008in" fo:language="en" fo:country="US" style:font-size-asian="9pt"/>
    </style:style>
    <style:style style:name="T25" style:family="text">
      <style:text-properties style:font-name="Calibri1" fo:font-size="10pt" style:font-size-asian="10pt"/>
    </style:style>
    <style:style style:name="T26" style:family="text">
      <style:text-properties style:font-name="Calibri1" fo:font-size="5pt" style:font-size-asian="5pt" style:font-size-complex="7pt"/>
    </style:style>
    <style:style style:name="T27" style:family="text">
      <style:text-properties style:font-name="Calibri1" fo:font-size="10pt" fo:font-style="italic" style:text-underline-style="solid" style:text-underline-width="auto" style:text-underline-color="font-color" style:font-size-asian="10pt" style:font-style-asian="italic" style:font-style-complex="italic"/>
    </style:style>
    <style:style style:name="T28" style:family="text">
      <style:text-properties style:font-name="Calibri1" fo:font-size="9pt" style:font-size-asian="9pt" style:font-size-complex="11pt"/>
    </style:style>
    <style:style style:name="T29" style:family="text">
      <style:text-properties style:font-name="Calibri1" fo:font-size="10pt" style:text-underline-style="solid" style:text-underline-width="auto" style:text-underline-color="font-color" style:font-size-asian="10pt"/>
    </style:style>
    <style:style style:name="T30" style:family="text">
      <style:text-properties style:font-name="Calibri1" fo:font-size="9pt" style:text-underline-style="solid" style:text-underline-width="auto" style:text-underline-color="font-color" style:font-size-asian="9pt" style:font-size-complex="11pt"/>
    </style:style>
    <style:style style:name="T31" style:family="text">
      <style:text-properties style:font-name="Calibri1" fo:font-size="10pt" fo:font-style="italic" style:text-underline-style="solid" style:text-underline-width="auto" style:text-underline-color="font-color" fo:font-weight="normal" style:font-size-asian="10pt" style:font-style-asian="italic" style:font-weight-asian="normal" style:font-style-complex="italic" style:font-weight-complex="normal"/>
    </style:style>
    <style:style style:name="T32" style:family="text">
      <style:text-properties style:font-name="Calibri1" fo:font-size="9pt" fo:font-weight="normal" style:font-size-asian="9pt" style:font-weight-asian="normal" style:font-size-complex="11pt" style:font-weight-complex="normal"/>
    </style:style>
    <style:style style:name="T33" style:family="text">
      <style:text-properties style:font-name="Calibri1" fo:font-size="10pt" fo:font-style="italic" style:text-underline-style="solid" style:text-underline-width="auto" style:text-underline-color="font-color" fo:font-weight="normal" style:font-size-asian="10pt" style:font-style-asian="italic" style:font-weight-asian="normal" style:font-size-complex="11pt" style:font-style-complex="italic" style:font-weight-complex="normal"/>
    </style:style>
    <style:style style:name="T34" style:family="text">
      <style:text-properties fo:font-size="10pt" style:font-size-asian="10pt"/>
    </style:style>
    <style:style style:name="T35" style:family="text">
      <style:text-properties style:font-name="Calibri" fo:font-size="9pt" style:font-size-asian="9pt" style:font-name-complex="Calibri2" style:font-size-complex="9pt" style:text-scale="110%"/>
    </style:style>
    <style:style style:name="T36" style:family="text">
      <style:text-properties style:font-name="Calibri" fo:font-size="9pt" fo:letter-spacing="-0.0083in" style:font-size-asian="9pt" style:font-name-complex="Calibri2" style:font-size-complex="9pt" style:text-scale="110%"/>
    </style:style>
    <style:style style:name="T37" style:family="text">
      <style:text-properties style:font-name="Calibri" fo:font-size="9pt" fo:letter-spacing="-0.0075in" style:font-size-asian="9pt" style:font-name-complex="Calibri2" style:font-size-complex="9pt" style:text-scale="110%"/>
    </style:style>
    <style:style style:name="T38" style:family="text">
      <style:text-properties style:font-name="Calibri" fo:font-size="9pt" fo:letter-spacing="-0.0063in" style:font-size-asian="9pt" style:font-name-complex="Calibri2" style:font-size-complex="9pt" style:text-scale="110%"/>
    </style:style>
    <style:style style:name="T39" style:family="text">
      <style:text-properties style:font-name="Calibri" fo:font-size="9pt" fo:letter-spacing="-0.0071in" style:font-size-asian="9pt" style:font-name-complex="Calibri2" style:font-size-complex="9pt" style:text-scale="110%"/>
    </style:style>
    <style:style style:name="T40" style:family="text">
      <style:text-properties style:font-name="Calibri" fo:font-size="9pt" fo:letter-spacing="-0.0043in" style:font-size-asian="9pt" style:font-name-complex="Calibri2" style:font-size-complex="9pt" style:text-scale="110%"/>
    </style:style>
    <style:style style:name="T41" style:family="text">
      <style:text-properties style:font-name="Calibri" fo:font-size="9pt" fo:letter-spacing="-0.0047in" style:font-size-asian="9pt" style:font-name-complex="Calibri2" style:font-size-complex="9pt" style:text-scale="110%"/>
    </style:style>
    <style:style style:name="T42" style:family="text">
      <style:text-properties style:font-name="Calibri" fo:font-size="9pt" fo:letter-spacing="-0.0055in" style:font-size-asian="9pt" style:font-name-complex="Calibri2" style:font-size-complex="9pt" style:text-scale="110%"/>
    </style:style>
    <style:style style:name="T43" style:family="text">
      <style:text-properties style:font-name="Calibri" fo:font-size="9pt" fo:letter-spacing="-0.0035in" style:font-size-asian="9pt" style:font-name-complex="Calibri2" style:font-size-complex="9pt" style:text-scale="110%"/>
    </style:style>
    <style:style style:name="T44" style:family="text">
      <style:text-properties style:font-name="Calibri" fo:font-size="9pt" fo:letter-spacing="-0.0028in" style:font-size-asian="9pt" style:font-name-complex="Calibri2" style:font-size-complex="9pt" style:text-scale="110%"/>
    </style:style>
    <style:style style:name="T45" style:family="text">
      <style:text-properties style:font-name="Calibri" fo:font-size="9pt" fo:letter-spacing="-0.0016in" style:font-size-asian="9pt" style:font-name-complex="Calibri2" style:font-size-complex="9pt" style:text-scale="110%"/>
    </style:style>
    <style:style style:name="T46" style:family="text">
      <style:text-properties style:font-name="Calibri" fo:font-size="9pt" fo:letter-spacing="-0.002in" style:font-size-asian="9pt" style:font-name-complex="Calibri2" style:font-size-complex="9pt" style:text-scale="110%"/>
    </style:style>
    <style:style style:name="T47" style:family="text">
      <style:text-properties style:font-name="Calibri" fo:font-size="9pt" fo:letter-spacing="-0.0008in" style:font-size-asian="9pt" style:font-name-complex="Calibri2" style:font-size-complex="9pt" style:text-scale="110%"/>
    </style:style>
    <style:style style:name="T48" style:family="text">
      <style:text-properties fo:font-size="10pt" style:font-size-asian="10pt" style:text-scale="110%"/>
    </style:style>
    <style:style style:name="T49" style:family="text">
      <style:text-properties fo:font-size="10pt" fo:language="en" fo:country="US" style:font-size-asian="10pt" style:text-scale="110%"/>
    </style:style>
    <style:style style:name="T50" style:family="text">
      <style:text-properties style:font-name="Calibri" fo:font-size="9pt" fo:language="en" fo:country="US" style:font-size-asian="9pt" style:font-name-complex="Calibri2" style:font-size-complex="9pt" style:text-scale="110%"/>
    </style:style>
    <style:style style:name="T51" style:family="text">
      <style:text-properties style:font-name="Calibri1" fo:font-size="9pt" style:font-size-asian="9pt"/>
    </style:style>
    <style:style style:name="T52" style:family="text">
      <style:text-properties style:font-name="Calibri1" fo:font-size="10pt" style:text-underline-style="solid" style:text-underline-width="auto" style:text-underline-color="font-color" fo:font-weight="bold" style:font-size-asian="10pt" style:font-weight-asian="bold" style:font-weight-complex="bold"/>
    </style:style>
    <style:style style:name="T53" style:family="text">
      <style:text-properties style:font-name="Calibri1" fo:font-size="10pt" fo:language="en" fo:country="US" fo:font-style="italic" style:font-size-asian="10pt" style:font-style-asian="italic" style:font-style-complex="italic"/>
    </style:style>
    <style:style style:name="T54" style:family="text">
      <style:text-properties style:font-name="Calibri" fo:font-size="9pt" fo:language="en" fo:country="US" style:font-size-asian="9pt" style:font-name-complex="Calibri2" style:font-size-complex="9pt"/>
    </style:style>
    <style:style style:name="T55" style:family="text">
      <style:text-properties style:font-name="Calibri" fo:font-size="9pt" fo:font-style="italic" style:font-size-asian="9pt" style:font-style-asian="italic" style:font-name-complex="Calibri2" style:font-size-complex="9pt" style:text-scale="110%"/>
    </style:style>
    <style:style style:name="T56" style:family="text">
      <style:text-properties fo:font-size="9pt" fo:language="en" fo:country="US" fo:font-style="italic" style:font-size-asian="9pt" style:font-style-asian="italic" style:text-scale="110%"/>
    </style:style>
    <style:style style:name="T57" style:family="text">
      <style:text-properties fo:font-size="10pt" fo:language="en" fo:country="US" fo:font-style="italic" style:font-size-asian="10pt" style:font-style-asian="italic" style:text-scale="110%"/>
    </style:style>
    <style:style style:name="T58" style:family="text">
      <style:text-properties style:font-name="Calibri" fo:font-size="9pt" fo:language="en" fo:country="US" fo:font-style="italic" style:font-size-asian="9pt" style:font-style-asian="italic" style:font-name-complex="Calibri2" style:font-size-complex="9pt" style:text-scale="110%"/>
    </style:style>
    <style:style style:name="T59" style:family="text">
      <style:text-properties fo:font-size="12pt" fo:font-weight="bold" style:font-size-asian="12pt" style:font-weight-asian="bold" style:font-size-complex="12pt"/>
    </style:style>
    <style:style style:name="T60" style:family="text">
      <style:text-properties fo:language="en" fo:country="US"/>
    </style:style>
    <style:style style:name="T61" style:family="text">
      <style:text-properties fo:font-size="11pt" style:font-size-asian="11pt" style:font-size-complex="11pt" style:text-scale="110%"/>
    </style:style>
    <style:style style:name="T62" style:family="text">
      <style:text-properties fo:font-size="11pt" style:font-size-asian="11pt" style:font-size-complex="11pt"/>
    </style:style>
    <style:style style:name="T63" style:family="text">
      <style:text-properties fo:font-size="11pt" fo:letter-spacing="0.028in" style:font-size-asian="11pt" style:font-size-complex="11pt"/>
    </style:style>
    <style:style style:name="T64" style:family="text">
      <style:text-properties fo:font-size="11pt" fo:letter-spacing="0.0264in" style:font-size-asian="11pt" style:font-size-complex="11pt"/>
    </style:style>
    <style:style style:name="T65" style:family="text">
      <style:text-properties fo:font-size="11pt" fo:letter-spacing="0.0252in" style:font-size-asian="11pt" style:font-size-complex="11pt"/>
    </style:style>
    <style:style style:name="T66" style:family="text">
      <style:text-properties fo:font-size="11pt" fo:font-style="italic" style:font-size-asian="11pt" style:font-style-asian="italic" style:font-size-complex="11pt" style:text-scale="110%"/>
    </style:style>
    <style:style style:name="T67" style:family="text">
      <style:text-properties fo:font-size="11pt" fo:letter-spacing="-0.002in" style:font-size-asian="11pt" style:font-size-complex="11pt" style:text-scale="110%"/>
    </style:style>
    <style:style style:name="T68" style:family="text">
      <style:text-properties fo:font-size="11pt" fo:letter-spacing="-0.0008in" style:font-size-asian="11pt" style:font-size-complex="11pt" style:text-scale="110%"/>
    </style:style>
    <style:style style:name="T69" style:family="text">
      <style:text-properties fo:font-size="11pt" fo:letter-spacing="-0.0016in" style:font-size-asian="11pt" style:font-size-complex="11pt" style:text-scale="110%"/>
    </style:style>
    <style:style style:name="T70" style:family="text">
      <style:text-properties fo:font-size="11pt" fo:letter-spacing="-0.0098in" style:font-size-asian="11pt" style:font-size-complex="11pt" style:text-scale="110%"/>
    </style:style>
    <style:style style:name="T71" style:family="text">
      <style:text-properties fo:font-size="11pt" fo:letter-spacing="-0.0091in" style:font-size-asian="11pt" style:font-size-complex="11pt" style:text-scale="110%"/>
    </style:style>
    <style:style style:name="T72" style:family="text">
      <style:text-properties fo:font-size="11pt" fo:letter-spacing="-0.0055in" style:font-size-asian="11pt" style:font-size-complex="11pt" style:text-scale="110%"/>
    </style:style>
    <style:style style:name="T73" style:family="text">
      <style:text-properties fo:font-size="11pt" fo:letter-spacing="-0.0047in" style:font-size-asian="11pt" style:font-size-complex="11pt" style:text-scale="110%"/>
    </style:style>
    <style:style style:name="T74" style:family="text">
      <style:text-properties fo:font-size="11pt" fo:letter-spacing="-0.0043in" style:font-size-asian="11pt" style:font-size-complex="11pt" style:text-scale="110%"/>
    </style:style>
    <style:style style:name="T75" style:family="text">
      <style:text-properties fo:font-size="11pt" fo:letter-spacing="-0.0063in" style:font-size-asian="11pt" style:font-size-complex="11pt" style:text-scale="110%"/>
    </style:style>
    <style:style style:name="T76" style:family="text">
      <style:text-properties fo:font-size="12pt" fo:letter-spacing="-0.0016in" fo:font-weight="bold" style:font-size-asian="12pt" style:font-weight-asian="bold" style:font-size-complex="12pt"/>
    </style:style>
    <style:style style:name="T77" style:family="text">
      <style:text-properties fo:font-size="11pt" fo:language="en" fo:country="US" style:font-size-asian="11pt" style:font-size-complex="11pt"/>
    </style:style>
    <style:style style:name="T78" style:family="text">
      <style:text-properties fo:letter-spacing="-0.0008in" fo:font-weight="bold" style:font-weight-asian="bold"/>
    </style:style>
    <style:style style:name="T79" style:family="text">
      <style:text-properties fo:language="en" fo:country="U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letter-spacing="-0.002in"/>
    </style:style>
    <style:style style:name="T82" style:family="text">
      <style:text-properties fo:letter-spacing="-0.0016in"/>
    </style:style>
    <style:style style:name="T83" style:family="text">
      <style:text-properties fo:letter-spacing="-0.0008in"/>
    </style:style>
    <style:style style:name="T84" style:family="text">
      <style:text-properties fo:font-size="12pt" fo:letter-spacing="0.0398in" fo:font-weight="bold" style:font-size-asian="12pt" style:font-weight-asian="bold" style:font-size-complex="12pt"/>
    </style:style>
    <style:style style:name="T85" style:family="text">
      <style:text-properties fo:font-size="12pt" fo:letter-spacing="-0.0008in" fo:font-weight="bold" style:font-size-asian="12pt" style:font-weight-asian="bold" style:font-size-complex="12pt"/>
    </style:style>
    <style:style style:name="T86" style:family="text">
      <style:text-properties fo:font-size="10pt" style:font-size-asian="10pt" style:font-size-complex="10pt"/>
    </style:style>
    <style:style style:name="T87" style:family="text">
      <style:text-properties fo:font-size="10pt" style:font-size-asian="10pt" style:font-size-complex="10pt" style:text-scale="110%"/>
    </style:style>
    <style:style style:name="T88" style:family="text">
      <style:text-properties fo:font-size="10pt" fo:letter-spacing="-0.0008in" style:font-size-asian="10pt" style:font-size-complex="10pt" style:text-scale="110%"/>
    </style:style>
    <style:style style:name="T89" style:family="text">
      <style:text-properties fo:font-size="10pt" fo:language="en" fo:country="US" style:font-size-asian="10pt" style:font-size-complex="10pt"/>
    </style:style>
    <style:style style:name="T90" style:family="text">
      <style:text-properties fo:font-size="10pt" fo:language="en" fo:country="US" style:font-size-asian="10pt" style:font-name-complex="F" style:font-size-complex="10pt"/>
    </style:style>
    <style:style style:name="T91" style:family="text">
      <style:text-properties fo:color="#000000" loext:opacity="100%" style:font-name="Arial" fo:font-size="8pt" fo:font-style="italic" fo:font-weight="bold" style:font-size-asian="8pt" style:font-style-asian="italic" style:font-weight-asian="bold" style:font-name-complex="Arial1" style:font-size-complex="8pt" style:font-style-complex="italic" style:font-weight-complex="bold">
        <loext:char-complex-color loext:theme-type="dark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3.3598in, 0in, 1.4362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solid" svg:stroke-width="0.0346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46in" fo:margin-top="0.0209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solid" svg:stroke-width="0.0311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74in" fo:margin-top="0.0209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3" style:family="graphic">
      <style:graphic-properties draw:stroke="solid" svg:stroke-width="0.0311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74in" fo:margin-top="0.0209in" fo:margin-bottom="0.020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style:style style:name="gr4" style:family="graphic">
      <style:graphic-properties draw:stroke="solid" svg:stroke-width="0.0417in" svg:stroke-color="#4f81bd" svg:stroke-linecap="butt" draw:fill="none" loext:fill-use-slide-background="false" draw:textarea-horizontal-align="center" draw:textarea-vertical-align="top" draw:auto-grow-height="false" fo:padding-top="0.0492in" fo:padding-bottom="0.0492in" fo:padding-left="0.0984in" fo:padding-right="0.0984in" fo:wrap-option="wrap" draw:shadow="visible" draw:shadow-offset-x="0in" draw:shadow-offset-y="0.0252in" draw:shadow-color="#000000" draw:shadow-opacity="35%" loext:shadow-blur="0.0437in" loext:decorative="false" fo:margin-left="0.0626in" fo:margin-right="0.0689in" fo:margin-top="0.0417in" fo:margin-bottom="0.1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5" style:family="graphic" style:parent-style-name="Frame">
      <style:graphic-properties draw:stroke="none" svg:stroke-width="0.028in" svg:stroke-linecap="butt" draw:fill="none" loext:fill-use-slide-background="false" draw:textarea-vertical-align="middle" draw:auto-grow-height="false" fo:min-height="0.3425in" fo:min-width="1.709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8in" svg:stroke-linecap="butt" draw:fill="none" loext:fill-use-slide-background="false" draw:textarea-vertical-align="middle" draw:auto-grow-height="false" fo:min-height="0.3425in" fo:min-width="1.709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Picture 1" text:anchor-type="char" svg:x="0.2307in" svg:y="0.0319in" svg:width="0.739in" svg:height="0.6626in" draw:z-index="30"><draw:image xlink:href="Pictures/1000000100000085000000828FE9FC1F.png" xlink:type="simple" xlink:show="embed" xlink:actuate="onLoad" draw:mime-type="image/png"/></draw:frame></text:p>
      <text:p text:style-name="P2" loext:marker-style-name="T2"><text:span text:style-name="T3"><text:s/></text:span><text:span text:style-name="T4"><text:s/></text:span><text:span text:style-name="T5">JURNAL</text:span><text:span text:style-name="T6"> </text:span><text:span text:style-name="T7">TEKNIK SIPIL </text:span><text:span text:style-name="T5">LATERAL</text:span></text:p>
      <text:p text:style-name="P3" loext:marker-style-name="T8"><draw:line text:anchor-type="char" draw:z-index="25" draw:name="Straight Connector 2" draw:style-name="gr4" draw:text-style-name="P4" svg:x1="1.2933in" svg:y1="0.035in" svg:x2="5.5917in" svg:y2="0.0354in"><text:p/></draw:line><text:span text:style-name="T8"><text:s text:c="31"/></text:span><text:span text:style-name="T9">PRODI</text:span><text:span text:style-name="T10"> </text:span><text:span text:style-name="T9">TEKNIK</text:span><text:span text:style-name="T11"> </text:span><text:span text:style-name="T9">SIPIL</text:span><text:span text:style-name="T10"> </text:span><text:span text:style-name="T9">UNIVERSITAS</text:span><text:span text:style-name="T12"> </text:span><text:span text:style-name="T9">TRIDINANTI</text:span></text:p>
      <text:p text:style-name="P5" loext:marker-style-name="T13"/>
      <text:p text:style-name="P6" loext:marker-style-name="T9"/>
      <text:p text:style-name="P7" loext:marker-style-name="T14"><text:span text:style-name="T14">KONSTRUKSI PEMBANGKIT LISTRIK TENAGA SURYA 50 KWH DI PT.X PALEMBANG</text:span><text:span text:style-name="T14"/></text:p>
      <text:p text:style-name="P8" loext:marker-style-name="T15"/>
      <text:p text:style-name="P9" loext:marker-style-name="T16"/>
      <text:p text:style-name="P10" loext:marker-style-name="T17"><text:span text:style-name="T17">Yohanes Eka Arissaputra</text:span><text:span text:style-name="T18">1)*2)</text:span></text:p>
      <text:p text:style-name="P11" loext:marker-style-name="T19"/>
      <text:p text:style-name="P12" loext:marker-style-name="T20"><text:span text:style-name="T21">1)</text:span><text:span text:style-name="T22"> </text:span><text:span text:style-name="T23">Program Studi Teknik Elektro Universitas Sanata Dharma, Paingan, Maguwoharjo, Yogyakarta, 55281, Palembang</text:span></text:p>
      <text:p text:style-name="P12" loext:marker-style-name="T20"><text:span text:style-name="T21">2</text:span><text:span text:style-name="T24">) </text:span><text:span text:style-name="T20">Program Studi Program Profesi Insinyur, Fakultas Teknik, Universitas Sriwijaya, Palembang, Sumatera Selatan, 30139, Palembang</text:span></text:p>
      <text:p text:style-name="P13" loext:marker-style-name="T1"/>
      <text:p text:style-name="P14" loext:marker-style-name="T20"><text:span text:style-name="T1">*Corresponding Author, email</text:span><text:span text:style-name="T20">: yohaneseka30@yahoo.com</text:span></text:p>
      <text:p text:style-name="P15" loext:marker-style-name="T25"/>
      <text:p text:style-name="P16" loext:marker-style-name="T26"><draw:line text:anchor-type="char" draw:z-index="26" draw:name="Straight Connector 19" draw:style-name="gr4" draw:text-style-name="P4" svg:x1="0.0157in" svg:y1="0.0535in" svg:x2="6.4992in" svg:y2="0.0539in"><text:p/></draw:line></text:p>
      <table:table table:name="Table1" table:style-name="Table1">
        <table:table-column table:style-name="Table1.A"/>
        <table:table-column table:style-name="Table1.B"/>
        <table:table-row table:style-name="Table1.1">
          <table:table-cell table:style-name="Table1.A1" office:value-type="string">
            <text:p text:style-name="P17" loext:marker-style-name="T27"><text:span text:style-name="T27">Artikel Info</text:span><text:span text:style-name="T27"/></text:p>
          </table:table-cell>
          <table:table-cell table:style-name="Table1.B1" office:value-type="string">
            <text:p text:style-name="P18" loext:marker-style-name="T28"><text:span text:style-name="T29">ABSTRAK</text:span><text:span text:style-name="T30"/></text:p>
          </table:table-cell>
        </table:table-row>
        <table:table-row table:style-name="Table1.1">
          <table:table-cell table:style-name="Table1.A2" office:value-type="string">
            <text:p text:style-name="P19" loext:marker-style-name="T31"><text:span text:style-name="T32">Diterima : <text:line-break/>Disetujui :<text:line-break/>Diterbitkan :</text:span><text:span text:style-name="T33"/></text:p>
          </table:table-cell>
          <table:table-cell table:style-name="Table1.A2" office:value-type="string">
            <text:p text:style-name="P20" loext:marker-style-name="T34"><text:span text:style-name="T35">Jurnal</text:span><text:span text:style-name="T36"> </text:span><text:span text:style-name="T35">ini</text:span><text:span text:style-name="T37"> </text:span><text:span text:style-name="T35">menyoroti</text:span><text:span text:style-name="T37"> </text:span><text:span text:style-name="T35">pentingnya</text:span><text:span text:style-name="T37"> </text:span><text:span text:style-name="T35">Sistem</text:span><text:span text:style-name="T37"> </text:span><text:span text:style-name="T35">Tenaga</text:span><text:span text:style-name="T38"> </text:span><text:span text:style-name="T35">Surya</text:span><text:span text:style-name="T37"> </text:span><text:span text:style-name="T35">Fotovoltaik</text:span><text:span text:style-name="T37"> </text:span><text:span text:style-name="T35">(SPP)</text:span><text:span text:style-name="T39"> </text:span><text:span text:style-name="T35">dalam</text:span><text:span text:style-name="T37"> </text:span><text:span text:style-name="T35">mendukung</text:span><text:span text:style-name="T39"> </text:span><text:span text:style-name="T35">energi berkelanjutan. SPP mengubah sinar matahari menjadi listrik, yang tidak hanya mengurangi jejak karbon</text:span><text:span text:style-name="T40"> </text:span><text:span text:style-name="T35">tetapi</text:span><text:span text:style-name="T41"> </text:span><text:span text:style-name="T35">juga</text:span><text:span text:style-name="T41"> </text:span><text:span text:style-name="T35">meningkatkan</text:span><text:span text:style-name="T40"> </text:span><text:span text:style-name="T35">kemandirian</text:span><text:span text:style-name="T40"> </text:span><text:span text:style-name="T35">energi</text:span><text:span text:style-name="T41"> </text:span><text:span text:style-name="T35">dan</text:span><text:span text:style-name="T40"> </text:span><text:span text:style-name="T35">mendukung</text:span><text:span text:style-name="T40"> </text:span><text:span text:style-name="T35">keberlanjutan</text:span><text:span text:style-name="T40"> </text:span><text:span text:style-name="T35">lingkungan. Oleh</text:span><text:span text:style-name="T41"> </text:span><text:span text:style-name="T35">karena</text:span><text:span text:style-name="T42"> </text:span><text:span text:style-name="T35">itu,</text:span><text:span text:style-name="T42"> </text:span><text:span text:style-name="T35">teknologi</text:span><text:span text:style-name="T40"> </text:span><text:span text:style-name="T35">ini</text:span><text:span text:style-name="T42"> </text:span><text:span text:style-name="T35">memainkan</text:span><text:span text:style-name="T41"> </text:span><text:span text:style-name="T35">peran</text:span><text:span text:style-name="T41"> </text:span><text:span text:style-name="T35">penting</text:span><text:span text:style-name="T41"> </text:span><text:span text:style-name="T35">dalam</text:span><text:span text:style-name="T43"> </text:span><text:span text:style-name="T35">transisi</text:span><text:span text:style-name="T42"> </text:span><text:span text:style-name="T35">menuju</text:span><text:span text:style-name="T41"> </text:span><text:span text:style-name="T35">energi</text:span><text:span text:style-name="T42"> </text:span><text:span text:style-name="T35">hijau.</text:span><text:span text:style-name="T42"> </text:span><text:span text:style-name="T35">Studi kasus dalam jurnal ini menunjukkan kontribusi signifikan SPP terhadap energi hijau di seluruh dunia, menunjukkan bagaimana penerapan SPP dapat mengurangi ketergantungan pada bahan bakar fosil dan meminimalkan emisi gas rumah kaca. Mengintegrasikan SPP ke dalam kebijakan dan infrastruktur energi kampus adalah langkah penting untuk mengurangi dampak perubahan iklim dan memastikan</text:span><text:span text:style-name="T44"> </text:span><text:span text:style-name="T35">masa</text:span><text:span text:style-name="T41"> </text:span><text:span text:style-name="T35">depan</text:span><text:span text:style-name="T43"> </text:span><text:span text:style-name="T35">energi</text:span><text:span text:style-name="T41"> </text:span><text:span text:style-name="T35">yang</text:span><text:span text:style-name="T40"> </text:span><text:span text:style-name="T35">berkelanjutan.</text:span><text:span text:style-name="T41"> </text:span><text:span text:style-name="T35">Dengan</text:span><text:span text:style-name="T41"> </text:span><text:span text:style-name="T35">pengembangan</text:span><text:span text:style-name="T41"> </text:span><text:span text:style-name="T35">dan</text:span><text:span text:style-name="T41"> </text:span><text:span text:style-name="T35">penerapan</text:span><text:span text:style-name="T41"> </text:span><text:span text:style-name="T35">yang tepat,</text:span><text:span text:style-name="T45"> </text:span><text:span text:style-name="T35">SPP</text:span><text:span text:style-name="T45"> </text:span><text:span text:style-name="T35">dapat</text:span><text:span text:style-name="T44"> </text:span><text:span text:style-name="T35">menjadi pilar</text:span><text:span text:style-name="T46"> </text:span><text:span text:style-name="T35">utama</text:span><text:span text:style-name="T45"> </text:span><text:span text:style-name="T35">dalam</text:span><text:span text:style-name="T47"> </text:span><text:span text:style-name="T35">strategi</text:span><text:span text:style-name="T44"> </text:span><text:span text:style-name="T35">global</text:span><text:span text:style-name="T44"> </text:span><text:span text:style-name="T35">untuk</text:span><text:span text:style-name="T44"> </text:span><text:span text:style-name="T35">mencapai</text:span><text:span text:style-name="T45"> </text:span><text:span text:style-name="T35">tujuan</text:span><text:span text:style-name="T46"> </text:span><text:span text:style-name="T35">keberlanjutan jangka panjang</text:span><text:span text:style-name="T48">.</text:span><text:span text:style-name="T49"> </text:span><text:span text:style-name="T35">Dalam jurnal ini juga akan menyoroti konstruksi Pembangkit Listrik Tenaga Surya (PLTS), yang dimulai dari Perencanaan sampai ke Pembuatan</text:span><text:span text:style-name="T50"> atau konstruksi</text:span><text:span text:style-name="T35"> Pembangkit Listrik Tenaga Surya</text:span><text:span text:style-name="T50"> tegangan 50 kWh, proses perencanaan pembuatan ( survey, simulasi, pengukuran, dan lain-lain) sampai ke tahap pembuatan atau konstruksi Pembangkit Listrik Tenaga Surya tegangan 50 kWh.</text:span></text:p>
            <text:p text:style-name="P21" loext:marker-style-name="T51"/>
            <text:p text:style-name="P21" loext:marker-style-name="T51"/>
            <text:p text:style-name="P21" loext:marker-style-name="T51"/>
            <text:p text:style-name="P21" loext:marker-style-name="T51"/>
            <text:p text:style-name="P21" loext:marker-style-name="T51"/>
            <text:p text:style-name="P21" loext:marker-style-name="T51"/>
            <text:p text:style-name="P22" loext:marker-style-name="T52"/>
          </table:table-cell>
        </table:table-row>
        <table:table-row table:style-name="Table1.1">
          <table:table-cell table:style-name="Table1.A3" office:value-type="string">
            <text:p text:style-name="P19" loext:marker-style-name="T25"><text:span text:style-name="T27">Kata Kunci</text:span><text:span text:style-name="T27"/></text:p>
          </table:table-cell>
          <table:table-cell table:style-name="Table1.B3" office:value-type="string">
            <text:p text:style-name="P23" loext:marker-style-name="T25"><text:span text:style-name="T52">ABSTRACT</text:span><text:span text:style-name="T52"/></text:p>
          </table:table-cell>
        </table:table-row>
        <table:table-row table:style-name="Table1.1">
          <table:table-cell table:style-name="Table1.A2" office:value-type="string">
            <text:p text:style-name="P19" loext:marker-style-name="T53"><text:span text:style-name="T53">Solar power plant, Energy, Sustainable energy, electricity, Constructon</text:span><text:span text:style-name="T53"/></text:p>
          </table:table-cell>
          <table:table-cell table:style-name="Table1.A2" office:value-type="string">
            <text:p text:style-name="P24" loext:marker-style-name="T54"><text:span text:style-name="T55">This journal highlights the importance of Photovoltaic Solar Power Systems (SPP) in supporting sustainable energy. SPP converts sunlight into electricity, which not only reduces the carbon footprint but also enhances energy independence and supports environmental sustainability. Thus, this technology plays a crucial role in the transition towards green energy. Case studies in this journal demonstrate the significant contribution of SPP to green energy worldwide, showing how the implementation of SPP can reduce dependence on fossil fuels and minimize greenhouse gas emissions. The implementation of SPP in campus life is also a concern, where its application can create a more environmentally friendly and energy-independent environment.</text:span><text:span text:style-name="T56"> </text:span><text:span text:style-name="T55">Integrating SPP into campus energy policies and infrastructure is a critical step to mitigating the impacts of climate change and ensuring a sustainable energy future. With proper development and application, SPP can become a major pillar in the global strategy to achieve long-term sustainability goals</text:span><text:span text:style-name="T57">.</text:span><text:span text:style-name="T55"> This jurnal will also highlights a construction of Solar </text:span><text:soft-page-break/><text:span text:style-name="T55">Power Plant from planning phase to contruction phase</text:span><text:span text:style-name="T58">.</text:span></text:p>
            <text:p text:style-name="P25" loext:marker-style-name="T25"/>
            <text:p text:style-name="P25" loext:marker-style-name="T25"/>
            <text:p text:style-name="P25" loext:marker-style-name="T25"/>
            <text:p text:style-name="P25" loext:marker-style-name="T25"/>
            <text:p text:style-name="P25" loext:marker-style-name="T25"/>
          </table:table-cell>
        </table:table-row>
      </table:table>
      <text:p text:style-name="P26" loext:marker-style-name="T25"><draw:line text:anchor-type="char" draw:z-index="27" draw:name="Straight Connector 19" draw:style-name="gr4" draw:text-style-name="P4" svg:x1="0in" svg:y1="0.1366in" svg:x2="6.4835in" svg:y2="0.137in"><text:p/></draw:line></text:p>
      <text:p text:style-name="P27" loext:marker-style-name="T9"/>
      <text:p text:style-name="P27" loext:marker-style-name="T9"/>
      <text:section text:style-name="Sect1" text:name="TextSection">
        <text:p text:style-name="P28"><text:span text:style-name="T59">PENDAHULUAN</text:span><text:span text:style-name="T12"> </text:span></text:p>
        <text:p text:style-name="P28"/>
        <text:p text:style-name="JRM_5f_Bodytext">Pembangkit Listrik Tenaga Surya (PLTS) atau Solar Power Plant (SPP) merupakan sebuah teknologi yang mengkonversi energi sinar matahari menjadi listrik. Tenaga matahari/surya merupakan energi terbarukan yang ramah lingkungan. Salah satu sumber energi terbarukan yang paling popular dan berkelanjutan di dunia saat ini. D<text:span text:style-name="T60">e</text:span>ngan memanfaatkan sinar mahatari yang melimpah dan gratis, PLTS mengurangi ketergantungan pada sumber energi fosil yang terbatas dan membantu mengurangi emisi gas rumah kaca yang berkontribusi terhadap perubahan iklim. Dalam era perubahan iklim dan kekhawatiran terhadap ketersediaan energi, PLTS menjadi solusi yang menjanjikan dalam mencapai keberlanjutan energi.</text:p>
        <text:p text:style-name="P29" loext:marker-style-name="T61"><text:span text:style-name="T61">Kini PLTS terbagi hingga menjadi 3 cara penggunaan: On Grid, Off Grid dan Hybrid. Penggunaan sumber energi konvensional terus mengalami peningkatan seiring dengan pertambahan populasi dan percepatan teknologi/industrialisasi. Di sisi lain </text:span><text:span text:style-name="T62">sumber</text:span><text:span text:style-name="T63"> </text:span><text:span text:style-name="T62">energi</text:span><text:span text:style-name="T63"> </text:span><text:span text:style-name="T62">tersebut</text:span><text:span text:style-name="T64"> </text:span><text:span text:style-name="T62">mengalami</text:span><text:span text:style-name="T64"> </text:span><text:span text:style-name="T62">penipisan</text:span><text:span text:style-name="T65"> </text:span><text:span text:style-name="T62">serta</text:span><text:span text:style-name="T63"> </text:span><text:span text:style-name="T62">dampak</text:span><text:span text:style-name="T63"> </text:span><text:span text:style-name="T62">polusi</text:span><text:span text:style-name="T63"> </text:span><text:span text:style-name="T62">akibat</text:span><text:span text:style-name="T63"> </text:span><text:span text:style-name="T62">konsumsi</text:span><text:span text:style-name="T64"> </text:span><text:span text:style-name="T62">energi </text:span><text:span text:style-name="T61">fosil kian hari semakin nyata. Untuk mendukung pembangunan berkelanjutan (</text:span><text:span text:style-name="T66">sustainable development</text:span><text:span text:style-name="T61">), upaya pemanfaatan sumber energi alternatif yang ramah lingkungan mutlak dilakukan. Alam Indonesia, baik dari tinjauan letak geografis maupun</text:span><text:span text:style-name="T67"> </text:span><text:span text:style-name="T61">sumber daya</text:span><text:span text:style-name="T68"> </text:span><text:span text:style-name="T61">alamnya,</text:span><text:span text:style-name="T69"> </text:span><text:span text:style-name="T61">mempunyai</text:span><text:span text:style-name="T68"> </text:span><text:span text:style-name="T61">potensi yang</text:span><text:span text:style-name="T67"> </text:span><text:span text:style-name="T61">sangat besar</text:span><text:span text:style-name="T69"> </text:span><text:span text:style-name="T61">akan</text:span><text:span text:style-name="T68"> </text:span><text:span text:style-name="T61">energi</text:span><text:span text:style-name="T68"> </text:span><text:span text:style-name="T61">yang ramah lingkungan, yang disebut dengan energi terbarukan. Dibutuhkan suatu usaha melalui studi dan penelitian, rekayasa serta pengimplementasian ke masyarakat agar potensi alam tersebut dapat dimanfaatkan dengan benar dan optimal.</text:span></text:p>
        <text:p text:style-name="P29" loext:marker-style-name="T62"><text:span text:style-name="T61">Keunggulan utama dari PLTS adalah lingkungannya yang bersih dan ramah lingkungan. Selama operasionalnya, PLTS tidak menghasilkan emisi gas rumah kaca atau polusi udara lainnya. Hal</text:span><text:span text:style-name="T68"> </text:span><text:span text:style-name="T61">ini</text:span><text:span text:style-name="T68"> </text:span><text:span text:style-name="T61">membantu</text:span><text:span text:style-name="T68"> </text:span><text:span text:style-name="T61">menjaga kualitas udara</text:span><text:span text:style-name="T68"> </text:span><text:span text:style-name="T61">yang menjadi lebih baik dan mengurangi dampak negatif terhadap kesehatan manusia. Selain itu, panel surya yang digunakan dalam PLTS memiliki umur panjang, membutuhkan sedikit perawatan,</text:span><text:span text:style-name="T70"> </text:span><text:span text:style-name="T61">mengurangi</text:span><text:span text:style-name="T71"> </text:span><text:span text:style-name="T61">limbah</text:span><text:span text:style-name="T71"> </text:span><text:span text:style-name="T61">elektronik</text:span><text:span text:style-name="T70"> </text:span><text:span text:style-name="T61">dan</text:span><text:span text:style-name="T71"> </text:span><text:span text:style-name="T61">memperpanjang</text:span><text:span text:style-name="T71"> </text:span><text:span text:style-name="T61">masa</text:span><text:span text:style-name="T70"> </text:span><text:span text:style-name="T61">pakai</text:span><text:span text:style-name="T71"> </text:span><text:span text:style-name="T61">infrastruktur energi</text:span><text:span text:style-name="T72"> </text:span><text:span text:style-name="T61">(Lee</text:span><text:span text:style-name="T72"> </text:span><text:span text:style-name="T61">&amp;</text:span><text:span text:style-name="T72"> </text:span><text:span text:style-name="T61">Ebong,</text:span><text:span text:style-name="T73"> </text:span><text:span text:style-name="T61">2017).</text:span><text:span text:style-name="T73"> </text:span><text:span text:style-name="T61">Meskipun</text:span><text:span text:style-name="T72"> </text:span><text:span text:style-name="T61">bergantung</text:span><text:span text:style-name="T73"> </text:span><text:span text:style-name="T61">pada</text:span><text:span text:style-name="T72"> </text:span><text:span text:style-name="T61">banyak</text:span><text:span text:style-name="T74"> </text:span><text:span text:style-name="T61">hal,</text:span><text:span text:style-name="T73"> </text:span><text:span text:style-name="T61">pada</text:span><text:span text:style-name="T74"> </text:span><text:span text:style-name="T61">umumnya</text:span><text:span text:style-name="T75"> </text:span><text:span text:style-name="T61">mur solar panel sendiri berkisar 20 s.d. 25 tahun (kompas.com). Dengan demikian, PLTS memberikan kontribusi positif dalam menjaga kelestarian lingkungan dan ekosistem (Branker et.al, 2011).</text:span></text:p>
        <text:p text:style-name="P30" loext:marker-style-name="T62"/>
        <text:p text:style-name="P28"><text:span text:style-name="T59">METODE</text:span><text:span text:style-name="T76"> </text:span><text:span text:style-name="T59">PENELITIAN</text:span></text:p>
        <text:p text:style-name="P28"/>
        <text:p text:style-name="P31" loext:marker-style-name="T62"><text:span text:style-name="T62">Metodologi yang digunakan dalam Jurnal ini meliputi berbagai metodologi sebagai berikut, yaitu, Survey lokasi konstruksi PLTS, Simulasi PLTS, Pengukuran Real time di lokasi, pengecekan alat dan bahan untuk konstruksi dan Konstruksi PLTS. </text:span><text:span text:style-name="T62"/></text:p>
        <text:p text:style-name="P32" loext:marker-style-name="T62"/>
        <text:p text:style-name="JRM_5f_Bodytext">Survey Lokasi</text:p>
        <text:p text:style-name="JRM_5f_Bodytext">Persiapan awal yaitu dengan menetapkan dan mensurvey lokasi, hal ini merupakan penentuan lokasi dimana konstruksi pembangkit listrik tenaga listrik akan dibangun.</text:p>
        <text:p text:style-name="JRM_5f_Bodytext">Menentukan lokasi juga harus dengan teliti dan disepakati oleh pihak-pihak yang terlibat di dalam projek konstruksi Pembangkit listrik tenaga surya tersebut, persetujuan pihak pihak sekitar lokasi yang ditentukan tersebut, hal-hal yang perlu diperhatikan dalam potential lokasi konstruksi merupakan posisi lokasi tersebut, apakah lokasi tersebut disinari cahaya mahari secara konstan dari terbit hinga terbenam, hal ini diperlukan untuk melihat apakah Pembangkit listrik tenaga surya yang direncanakan bisa tersinari cahaya sinar matahari secara terus menerus dan membuat kinerja semakin meningkat, selanjutnya yang perlu diperhatikan dalam menentukan lokasi yaitu kondisi lokasi tersebut, apakah kondisi lokasi tersebut bagus atau tidak untuk melakukan konstruksi, kelembaban, kondisi lantai atap, pohon, luas lokasi berpengaruh dalam penentuan lokasi konstruksi.</text:p>
        <text:p text:style-name="JRM_5f_Bodytext">Hal-hal yang disebutkan sebelumnya merupakan berbagai macan situasi yang diperlukan dalam menentukan potential lokasi konstruksi Pembangkit listrik tenaga listrik</text:p>
        <text:p text:style-name="JRM_5f_Bodytext">Simulasi</text:p>
        <text:p text:style-name="JRM_5f_Bodytext">Membuat simulasi untuk Pembangkit listrik tenaga surya yang meliputi lokasi yang sudah ditetapkan, banyaknya modul pembangkit listrik tenaga surya yang direncanakan untuk dibangun, aksesoris sekitar seperti pohon-pohon di sekitar lokasi, Panjang dan lebar pohon, Panjang dan lebar lokasi yang ditentukan agar tidak ada error dalam konstruksi pembangkit listrik tenaga surya yang akan dibangun, serta simulasi arah sinar matahari dari jam yang ditentukan, misalnya dari pagi hari sampai sore hari.</text:p>
        <text:p text:style-name="JRM_5f_Bodytext">Pengukuran Real time</text:p>
        <text:p text:style-name="JRM_5f_Bodytext">Pengukuran Lokasi konstruksi yang dilakukan untuk mengecek kepastian data yang ada dengan data di real time, Panjang lebar pohon, Panjang dan lebar obstacle dan data yang didapat di Real time akan dibandingkan dengan data yang ada di simulasi dan disesuaikan agar data yang didapat akurat dan tidak menjadi masalah saat mengkonstruksi Pembangkit listrik tenaga listrik.</text:p>
        <text:p text:style-name="JRM_5f_Bodytext"><text:soft-page-break/>Pengecekan Alat dan Bahan Material</text:p>
        <text:p text:style-name="JRM_5f_Bodytext">Pemeriksaan alat seperti modul Pembangkit listrik tenaga surya, AC combiner, DC output, dan Inverter yang akan digunakan untuk mengkonstruksi Pembangkit listrik tenaga surya, jumlah modul, jenis Inverter dan modul yang harus sama denga apa yang sudah disetujukan.</text:p>
        <text:p text:style-name="JRM_5f_Bodytext">Konstruksi PLTS</text:p>
        <text:p text:style-name="JRM_5f_Bodytext" loext:marker-style-name="T60">Persiapan awal untuk konstruksi PLTS yaitu membangun support untuk modul PLTS, setelah support modul PLTS dibuat maka Langkah selanjutnya untuk menaruh modul PLTS di support yang sudah disediakan, modul satu dan modul lain diberi jarak agar modul satu tidak menggangu kerja modul lainnya, setelah modul PLTS sudah di pasang sesuai jumlah yang ditetapkan, maka pemasangan kabel adalah Langkah selanjutnya, kabel ini akan dihubungkan ke modul PLTS, AC combiner, Inverter dan DC output, Langkah selanjutnya yaitu pemasangan AC combiner, Inverter dan DC output di ruang yang sudah ditentuka untuk pemasangan alat-alat ini, PLTS ini memiliki string type yang berjumlah 4 yang akan dipasang ke Inverter, setelah selesai maka pemasangan selanjutnya yaitu Sensor temeratur dan sensor Iradian, setelah sensor terpasang maka selanjutnya pengecekan alat dan sycro Inverter dengan PLTS dan PLTS siap untuk digunakan dan dapat dimonitor dengan aplikasi yang sudah ditetapkan, untuk PLTS ini dimonitor dengan berbasis Web.<text:span text:style-name="T60"/></text:p>
        <text:p text:style-name="P33" loext:marker-style-name="T77"/>
        <text:p text:style-name="P34" loext:marker-style-name="T62"/>
        <text:p text:style-name="P35"><text:span text:style-name="T9">HASIL</text:span><text:span text:style-name="T11"> </text:span><text:span text:style-name="T9">DAN</text:span><text:span text:style-name="T78"> </text:span><text:span text:style-name="T9">PEMBAHASAN</text:span><text:span text:style-name="T78"> </text:span></text:p>
        <text:p text:style-name="P35"/>
        <text:p text:style-name="JRM_5f_Bodytext">Konstruksi PLTS 50 kWh</text:p>
        <text:p text:style-name="JRM_5f_Bodytext">Pembahasan dan hasil dari Konstruksi PLTS 50 kWh yang sudah dilakukan dan dilaksanakan <text:s/></text:p>
        <text:p text:style-name="JRM_5f_Bodytext"/>
        <text:list text:style-name="WWNum1">
          <text:list-item>
            <text:p text:style-name="P36">Penurunan Bahan-Bahan PLTS 50 kWh</text:p>
          </text:list-item>
        </text:list>
        <text:p text:style-name="JRM_5f_Bodytext">dimulai dengan pengangkatan dan pembongkaran alat PLTS 50 kWh, pada gambar 2. Kegiatan yang dilaksanakan berupa menurunkan bahan-bahan PLTS yang akan dikonstruksi, meliputi Modul, Support PLTS, AC combiner, Inverter</text:p>
        <text:p text:style-name="JRM_5f_Bodytext" loext:marker-style-name="T60"><draw:frame draw:style-name="fr2" draw:name="Picture 34" text:anchor-type="as-char" svg:width="1.2398in" svg:height="1.6252in" draw:z-index="0"><draw:image xlink:href="Pictures/100000000000013A0000010AB0F1B9D1.jpg" xlink:type="simple" xlink:show="embed" xlink:actuate="onLoad" draw:mime-type="image/jpeg"/></draw:frame><draw:frame draw:style-name="fr2" draw:name="Picture 36" text:anchor-type="as-char" svg:width="1.2709in" svg:height="1.6252in" draw:z-index="0"><draw:image xlink:href="Pictures/10000000000001130000010DD13B0A4B.jpg" xlink:type="simple" xlink:show="embed" xlink:actuate="onLoad" draw:mime-type="image/jpeg"/></draw:frame></text:p>
        <text:p text:style-name="JRM_5f_Bodytext"><text:s text:c="3"/>Gambar 2. Pembongkaran bahan PLTS 50 kWh</text:p>
        <text:p text:style-name="JRM_5f_Bodytext"/>
        <text:list text:continue-numbering="true" text:style-name="WWNum1">
          <text:list-item>
            <text:p text:style-name="P36">Membuat Support Module PLTS 50 kWh</text:p>
          </text:list-item>
        </text:list>
        <text:p text:style-name="JRM_5f_Bodytext" loext:marker-style-name="T60">Memulai konstruksi PLTS 50 kWh dengan yang pertama membangun support untuk meletakkan modul PLTS yang tersedia, diukur jarak antara support kesupport lain dari PLTS yang sudah dibangun yaitu PLTS 50kWh, supaya modul satu tidak menggangu kerja modul lain dengan menghalangkan sinar matahari yang akan diserap oleh modul PLTS dan menyebabkan data tidak bisa dibaca<text:span text:style-name="T60">, gambar 3. Merupakan kegiatan konstruksi Support PLTS </text:span><text:span text:style-name="T60"/></text:p>
        <text:p text:style-name="JRM_5f_Bodytext" loext:marker-style-name="T60"><draw:frame draw:style-name="fr2" draw:name="Picture 37" text:anchor-type="as-char" svg:width="1.4374in" svg:height="1.6272in" draw:z-index="0"><draw:image xlink:href="Pictures/100000000000014200000127E4EB1971.jpg" xlink:type="simple" xlink:show="embed" xlink:actuate="onLoad" draw:mime-type="image/jpeg"/></draw:frame><draw:frame draw:style-name="fr2" draw:name="Picture 39" text:anchor-type="as-char" svg:width="1.3528in" svg:height="1.6264in" draw:z-index="0"><draw:image xlink:href="Pictures/100000000000013B00000132BA2E5304.jpg" xlink:type="simple" xlink:show="embed" xlink:actuate="onLoad" draw:mime-type="image/jpeg"/></draw:frame></text:p>
        <text:p text:style-name="JRM_5f_Bodytext">Gambar 3. Pembuatan Support PLTS</text:p>
        <text:list text:continue-numbering="true" text:style-name="WWNum1">
          <text:list-item>
            <text:p text:style-name="P36">Pemasangan Module PLTS</text:p>
          </text:list-item>
        </text:list>
        <text:p text:style-name="JRM_5f_Bodytext" loext:marker-style-name="T60"><text:soft-page-break/>Mulai memasang modul PLTS 50 kWh yang diletakkan di atas support yang sudah dibangun, modul PLTS 50 kWh diberi jarak sekitar 2 cm dari masing masing agar tidak rapat dan menganggu kerja modul satu dengan modul lain, setelah modul diletakkan maka akan di lock in supaya modul tidak jatu<text:span text:style-name="T60">h, gambar 4. Merupakan gambar pemasangan modul PLTS</text:span><text:span text:style-name="T60"/></text:p>
        <text:p text:style-name="JRM_5f_Bodytext" loext:marker-style-name="T79"><draw:frame draw:style-name="fr2" draw:name="Picture 43" text:anchor-type="as-char" svg:width="1.3957in" svg:height="1.8319in" draw:z-index="0"><draw:image xlink:href="Pictures/1000000000000126000001528B525AF7.jpg" xlink:type="simple" xlink:show="embed" xlink:actuate="onLoad" draw:mime-type="image/jpeg"/></draw:frame><draw:frame draw:style-name="fr2" draw:name="Picture 45" text:anchor-type="as-char" svg:width="1.3957in" svg:height="1.8189in" draw:z-index="0"><draw:image xlink:href="Pictures/1000000000000161000001203254BE53.jpg" xlink:type="simple" xlink:show="embed" xlink:actuate="onLoad" draw:mime-type="image/jpeg"/></draw:frame></text:p>
        <text:p text:style-name="JRM_5f_Bodytext">Gambar 4. Pemasangan Module PLTS</text:p>
        <text:list text:continue-numbering="true" text:style-name="WWNum1">
          <text:list-item>
            <text:p text:style-name="P36">Pemasangan Kabel dan Sensor</text:p>
          </text:list-item>
        </text:list>
        <text:p text:style-name="JRM_5f_Bodytext" loext:marker-style-name="T60">Pemasangan kabel PLTS 50 kWh beserta perbaikan jalur kabel yang lama, design yang akan digunakan yaitu menghubungkan PLTS 50 kWh dengan PLTS 30 kWh dengan system grit yang dihubungan ke inverter<text:span text:style-name="T60">, Gambar 5 merupakan pemasangan Kabel PLTS 50 kWh</text:span><text:span text:style-name="T60"/></text:p>
        <text:p text:style-name="JRM_5f_Bodytext" loext:marker-style-name="T60"><draw:frame draw:style-name="fr2" draw:name="Picture 46" text:anchor-type="as-char" svg:width="1.3646in" svg:height="1.6028in" draw:z-index="0"><draw:image xlink:href="Pictures/100000000000013800000161158413C7.jpg" xlink:type="simple" xlink:show="embed" xlink:actuate="onLoad" draw:mime-type="image/jpeg"/></draw:frame><draw:frame draw:style-name="fr2" draw:name="Picture 49" text:anchor-type="as-char" svg:width="1.3957in" svg:height="1.6311in" draw:z-index="0"><draw:image xlink:href="Pictures/100000000000012100000167BB45D2DA.jpg" xlink:type="simple" xlink:show="embed" xlink:actuate="onLoad" draw:mime-type="image/jpeg"/></draw:frame></text:p>
        <text:p text:style-name="JRM_5f_Bodytext">Gambar 5. Pemasangan Kabel PLTS 50 kWh</text:p>
        <text:p text:style-name="JRM_5f_Bodytext">Selanjutnnya Membuat Sensor Pengukuran suhu atau sensor temperature dan sensor Iradian yang dipasang ke PLTS 50 kWh</text:p>
        <text:p text:style-name="JRM_5f_Bodytext" loext:marker-style-name="T60"><draw:frame draw:style-name="fr2" draw:name="Picture 71" text:anchor-type="as-char" svg:width="1.8126in" svg:height="1.7917in" draw:z-index="0"><draw:image xlink:href="Pictures/10000000000001450000018A6F36F89B.jpg" xlink:type="simple" xlink:show="embed" xlink:actuate="onLoad" draw:mime-type="image/jpeg"/></draw:frame></text:p>
        <text:p text:style-name="JRM_5f_Bodytext">Gambar 6. Sensor Pengukuran Suhu</text:p>
        <text:list text:continue-numbering="true" text:style-name="WWNum1">
          <text:list-item>
            <text:p text:style-name="P36">Pemasangan AC combiner dan Inverter</text:p>
          </text:list-item>
        </text:list>
        <text:p text:style-name="JRM_5f_Bodytext" loext:marker-style-name="T60"><draw:frame draw:style-name="fr2" draw:name="Picture 59" text:anchor-type="as-char" svg:width="2.1335in" svg:height="1.5327in" draw:z-index="0"><draw:image xlink:href="Pictures/100000000000013800000151DCBE6484.jpg" xlink:type="simple" xlink:show="embed" xlink:actuate="onLoad" draw:mime-type="image/jpeg"/></draw:frame></text:p>
        <text:p text:style-name="JRM_5f_Bodytext">Gambar 7. Mengeluarkan AC combiner</text:p>
        <text:p text:style-name="P37">Pada gambar 6 Mengeluarkan AC combiner dan membersihkan ruang yang akan dihancurkan untuk memasukkan kabel dari PLTS 50 kWh</text:p>
        <text:p text:style-name="P37"/>
        <text:p text:style-name="P38"><draw:frame draw:style-name="fr2" draw:name="Picture 61" text:anchor-type="as-char" svg:width="1.4374in" svg:height="1.5898in" draw:z-index="0"><draw:image xlink:href="Pictures/10000000000001380000015EF0A5A324.jpg" xlink:type="simple" xlink:show="embed" xlink:actuate="onLoad" draw:mime-type="image/jpeg"/></draw:frame><draw:frame draw:style-name="fr2" draw:name="Picture 65" text:anchor-type="as-char" svg:width="1.2909in" svg:height="1.5791in" draw:z-index="0"><draw:image xlink:href="Pictures/100000000000011F0000015F5AF6AA15.jpg" xlink:type="simple" xlink:show="embed" xlink:actuate="onLoad" draw:mime-type="image/jpeg"/></draw:frame></text:p>
        <text:p text:style-name="P37" loext:marker-style-name="T80"><text:span text:style-name="T80">Gambar 8. Pemasangan AC combiner dan pembuatan jalur Kabel</text:span><text:span text:style-name="T80"/></text:p>
        <text:p text:style-name="P39" loext:marker-style-name="T80"/>
        <text:p text:style-name="P37">Gambar 8 merupakan pemasangan AC combiner dan pembuatan jalur kabel yang akan menghubungkan antara PLTS, AC combiner, dan Inverter dengan AC combiner tipe String 4, gambar 9 merupakan gambar AC combiner dan Inverter yang telah dipasang</text:p>
        <text:p text:style-name="P37"/>
        <text:p text:style-name="P37"/>
        <text:p text:style-name="P38"><text:soft-page-break/><draw:frame draw:style-name="fr2" draw:name="Picture 66" text:anchor-type="as-char" svg:width="1.4689in" svg:height="1.9272in" draw:z-index="0"><draw:image xlink:href="Pictures/1000000000000143000001A804BB67D5.jpg" xlink:type="simple" xlink:show="embed" xlink:actuate="onLoad" draw:mime-type="image/jpeg"/></draw:frame><draw:frame draw:style-name="fr2" draw:name="Picture 67" text:anchor-type="as-char" svg:width="1.3335in" svg:height="1.9339in" draw:z-index="0"><draw:image xlink:href="Pictures/1000000000000125000001AA3E2D7617.jpg" xlink:type="simple" xlink:show="embed" xlink:actuate="onLoad" draw:mime-type="image/jpeg"/></draw:frame></text:p>
        <text:p text:style-name="P37"/>
        <text:p text:style-name="JRM_5f_Bodytext">Gambar 9. AC combiner dan Inverter yang telah dipasang</text:p>
        <text:list text:continue-numbering="true" text:style-name="WWNum1">
          <text:list-item>
            <text:p text:style-name="P36">Pengecekan String dan Pengecekan kerja PLTS 50 kWh</text:p>
          </text:list-item>
        </text:list>
        <text:p text:style-name="JRM_5f_Bodytext">Pengecekan string pada AC combiner apakah string yang ada di AC combiner sudah memiliki tegangan sama dengan string yang ada di module PLTS 50 kWh, jika belum sama atau terjadi gangguan dari string AC combiner atau string PLTS, maka akan dilakukan pembenaran dan pengecekan ulang sampai tegangan dari kedua string itu sama, gambar 10 merupakan hasil dimana string sudah tidak ada masalah.</text:p>
        <text:p text:style-name="P40" loext:marker-style-name="T60"><draw:frame draw:style-name="fr2" draw:name="Picture 72" text:anchor-type="as-char" svg:width="1.4689in" svg:height="1.8752in" draw:z-index="0"><draw:image xlink:href="Pictures/10000000000001430000019DB2900BAF.jpg" xlink:type="simple" xlink:show="embed" xlink:actuate="onLoad" draw:mime-type="image/jpeg"/></draw:frame><draw:frame draw:style-name="fr2" draw:name="Picture 73" text:anchor-type="as-char" svg:width="1.3437in" svg:height="1.8972in" draw:z-index="0"><draw:image xlink:href="Pictures/1000000000000128000001A126FAC7AC.jpg" xlink:type="simple" xlink:show="embed" xlink:actuate="onLoad" draw:mime-type="image/jpeg"/></draw:frame></text:p>
        <text:p text:style-name="JRM_5f_Bodytext">Gambar 10. Pengecekan String</text:p>
        <text:p text:style-name="P40"><draw:frame draw:style-name="fr2" draw:name="Picture 75" text:anchor-type="as-char" svg:width="2.5516in" svg:height="2.2689in" draw:z-index="0"><draw:image xlink:href="Pictures/1000000000000123000001B4D7107718.jpg" xlink:type="simple" xlink:show="embed" xlink:actuate="onLoad" draw:mime-type="image/jpeg"/></draw:frame></text:p>
        <text:p text:style-name="JRM_5f_Bodytext">Gambar 11. Hasil dan Pengecekan kerja</text:p>
        <text:p text:style-name="JRM_5f_Bodytext">Gambar 11 merupakan gambar dari pengecekan kerja AC combiner dan Inverter PLTS 50 kWh, jika lampu yang ada di Inverter menyala satu persatu secara pelan and berulang, maka pengecekan alat tersebut sudah bagus dan siap digunakan, jika belum maka lampu yang ada di Inverter tidak akan menyala satu persatu tetapi akan menyala semua </text:p>
        <text:p text:style-name="P34" loext:marker-style-name="T62"/>
        <text:p text:style-name="P41" loext:marker-style-name="T9"/>
        <text:p text:style-name="P35"><text:span text:style-name="T9">KESIMPULAN</text:span><text:span text:style-name="T11"> </text:span>(Font<text:span text:style-name="T81"> </text:span>Times<text:span text:style-name="T82"> </text:span>New<text:span text:style-name="T83"> </text:span>Roman<text:span text:style-name="T81"> </text:span>1<text:span text:style-name="T60">2</text:span> Pt,<text:span text:style-name="T83"> </text:span>Cetak<text:span text:style-name="T83"> </text:span>Tebal)</text:p>
        <text:p text:style-name="P35"/>
        <text:p text:style-name="JRM_5f_Bodytext">Kesimpulan Dari hasil perhitungan yang telah dilakukan, maka kesimpulan yang dapat diambil dari penelitian ini adalah : </text:p>
        <text:list text:style-name="WWNum3">
          <text:list-item>
            <text:p text:style-name="P42">Pada Konstruksi PLTS, proses konstruksi berjalan dengan lancer dan aman, terdapat halangan yaitu cuaca atau iklim tetapi tidak ada masalah yang sampai level membahayakan .</text:p>
          </text:list-item>
          <text:list-item>
            <text:p text:style-name="P42">Hasil Pengujian PLTS 50 kWh lancer dan PLTS berfungsi dengan sedikit masalah.</text:p>
          </text:list-item>
        </text:list>
        <text:p text:style-name="JRM_5f_Bodytext">Saran</text:p>
        <text:p text:style-name="JRM_5f_Bodytext">Berikut ini adalah saran yang dapat digunakan untuk tahap pengembangan <text:span text:style-name="T60">jurnal</text:span> ini agar lebih baik lagi antara lain :</text:p>
        <text:list text:style-name="WWNum2">
          <text:list-item>
            <text:p text:style-name="P43" loext:marker-style-name="T60"><text:span text:style-name="T60">Segera </text:span>lakukan perbaikan atau penggantian pedoman tekanan untuk memastikan keselamatan dan keandalan <text:span text:style-name="T60">konstruksi PLTS</text:span>.</text:p>
          </text:list-item>
          <text:list-item>
            <text:p text:style-name="P43">Segera lakukan pemeriksaan Ketika terlihat adanya masalah</text:p>
          </text:list-item>
          <text:list-item>
            <text:p text:style-name="P43"><text:soft-page-break/>Alat pengaman dan perlengkapan supaya diperhatikan dan dirawat dengan baik.</text:p>
          </text:list-item>
        </text:list>
        <text:p text:style-name="P44" loext:marker-style-name="T59"/>
        <text:p text:style-name="P28"><text:span text:style-name="T59">UCAPAN TERIMA KASIH</text:span><text:span text:style-name="T84"> </text:span></text:p>
        <text:p text:style-name="P28"/>
        <text:p text:style-name="JRM_5f_Bodytext">Terima kasih kepada semua pihak yang telah berkontribusi dalam penyelesaian paper ini khususnya dosen pembimbing Program Studi Program Profesi insinyur universitas Sriwijaya. <text:s/>Semoga paper ini dapat memberikan manfaat bagi pembaca dan menjadi referensi yang berguna dalam bidang terkait.</text:p>
        <text:p text:style-name="P44" loext:marker-style-name="T59"/>
        <text:p text:style-name="P28"><text:span text:style-name="T59">DAFTAR</text:span><text:span text:style-name="T85"> </text:span><text:span text:style-name="T59">PUSTAKA</text:span><text:span text:style-name="T84"> </text:span></text:p>
        <text:p text:style-name="P28"/>
        <text:p text:style-name="P28" loext:marker-style-name="T60"><text:span text:style-name="T60">Dari Jurnal :</text:span><text:span text:style-name="T60"/></text:p>
        <text:p text:style-name="P45" loext:marker-style-name="T60"/>
        <text:p text:style-name="P46" loext:marker-style-name="T86"><field:fieldmark-start text:name="Bookmark" field:type="vnd.oasis.opendocument.field.UNHANDLED"><field:param field:name="vnd.oasis.opendocument.field.code" field:value="ADDIN Mendeley Bibliography CSL_BIBLIOGRAPHY"/></field:fieldmark-start><field:fieldmark-separator/><text:span text:style-name="T86">[1]<text:tab/></text:span><text:span text:style-name="T87">Lee, T. D., &amp; Ebong, A.</text:span><text:span text:style-name="T88"> </text:span><text:span text:style-name="T87">U. (2017). A</text:span><text:span text:style-name="T88"> </text:span><text:span text:style-name="T87">review of thin film solar cell technologies and challenges. Renewable and Sustainable Energy Reviews, 70, 1286-1297.</text:span></text:p>
        <text:p text:style-name="P47" loext:marker-style-name="T86"/>
        <text:p text:style-name="P48" loext:marker-style-name="T86"><text:span text:style-name="T86">[2]<text:tab/>Branker,K., Pathak, M.J.M.,and Pearce,J.M.(2011). A review of solar photovoltaic levelized cost of electricity.Renewable and sustainable energy reveiews, 15(9), 4470-4482.</text:span><text:span text:style-name="T86"/></text:p>
        <text:p text:style-name="P49" loext:marker-style-name="T89"><field:fieldmark-end/><text:span text:style-name="T90"/></text:p>
        <text:p text:style-name="P50" loext:marker-style-name="T6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ngXian" svg:font-family="DengXian"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nion Pro" svg:font-family="'Minion Pro'" style:font-family-generic="system" style:font-pitch="variable"/>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2pt" style:font-size-asian="12pt" style:font-size-complex="12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JRM_5f_Bodytext" loext:linked-style-name="Heading_20_1_20_Char" style:auto-update="true" style:default-outline-level="1" style:class="chapter">
      <style:paragraph-properties fo:margin-left="0.1972in" fo:margin-top="0.0835in" fo:margin-bottom="0.0835in" style:contextual-spacing="false" fo:keep-together="always" fo:orphans="2" fo:widows="2" fo:text-indent="-0.1972in" style:auto-text-indent="false" fo:keep-with-next="always"/>
      <style:text-properties fo:color="#000000" loext:opacity="100%" fo:font-size="10pt" fo:language="en" fo:country="US" fo:font-weight="bold" style:font-name-asian="宋体" style:font-family-asian="宋体" style:font-family-generic-asian="system" style:font-pitch-asian="variable" style:font-size-asian="10pt" style:font-weight-asian="bold" style:font-size-complex="10pt" style:font-weight-complex="bold">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class="chapter">
      <style:paragraph-properties fo:margin-top="0.028in" fo:margin-bottom="0in" style:contextual-spacing="false" fo:keep-together="always" fo:orphans="2" fo:widows="2" fo:keep-with-next="always"/>
      <style:text-properties fo:color="#365f91" loext:opacity="100%" style:font-name="Cambria" fo:font-family="Cambria" style:font-family-generic="roman" style:font-pitch="variable" fo:font-size="13pt" fo:language="en" fo:country="US" style:font-name-asian="宋体" style:font-family-asian="宋体"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class="chapter">
      <style:paragraph-properties fo:margin-top="0.028in" fo:margin-bottom="0in" style:contextual-spacing="false" fo:keep-together="always" fo:orphans="2" fo:widows="2" fo:keep-with-next="always"/>
      <style:text-properties fo:color="#243f60" loext:opacity="100%" style:font-name="Cambria" fo:font-family="Cambria" style:font-family-generic="roman" style:font-pitch="variable" fo:font-size="12pt" fo:language="en" fo:country="US" style:font-name-asian="宋体" style:font-family-asian="宋体"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class="chapter">
      <style:paragraph-properties fo:margin-top="0.028in" fo:margin-bottom="0in" style:contextual-spacing="false" fo:keep-together="always" fo:orphans="2" fo:widows="2" fo:keep-with-next="always"/>
      <style:text-properties fo:color="#365f91" loext:opacity="100%" style:font-name="Cambria" fo:font-family="Cambria" style:font-family-generic="roman" style:font-pitch="variable" fo:font-size="10pt" fo:language="en" fo:country="US" fo:font-style="italic" style:font-name-asian="宋体" style:font-family-asian="宋体"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chapter">
      <style:paragraph-properties fo:margin-top="0.028in" fo:margin-bottom="0in" style:contextual-spacing="false" fo:keep-together="always" fo:orphans="2" fo:widows="2" fo:keep-with-next="always"/>
      <style:text-properties fo:color="#365f91" loext:opacity="100%" style:font-name="Cambria" fo:font-family="Cambria" style:font-family-generic="roman" style:font-pitch="variable" fo:font-size="10pt" fo:language="en" fo:country="US" style:font-name-asian="宋体" style:font-family-asian="宋体"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chapter">
      <style:paragraph-properties fo:margin-top="0.028in" fo:margin-bottom="0in" style:contextual-spacing="false" fo:keep-together="always" fo:orphans="2" fo:widows="2" fo:keep-with-next="always"/>
      <style:text-properties fo:color="#243f60" loext:opacity="100%" style:font-name="Cambria" fo:font-family="Cambria" style:font-family-generic="roman" style:font-pitch="variable" fo:font-size="10pt" fo:language="en" fo:country="US" style:font-name-asian="宋体" style:font-family-asian="宋体"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chapter">
      <style:paragraph-properties fo:margin-top="0.028in" fo:margin-bottom="0in" style:contextual-spacing="false" fo:keep-together="always" fo:orphans="2" fo:widows="2" fo:keep-with-next="always"/>
      <style:text-properties fo:color="#243f60" loext:opacity="100%" style:font-name="Cambria" fo:font-family="Cambria" style:font-family-generic="roman" style:font-pitch="variable" fo:font-size="10pt" fo:language="en" fo:country="US" fo:font-style="italic" style:font-name-asian="宋体" style:font-family-asian="宋体"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chapter">
      <style:paragraph-properties fo:margin-top="0.028in" fo:margin-bottom="0in" style:contextual-spacing="false" fo:keep-together="always" fo:orphans="2" fo:widows="2" fo:keep-with-next="always"/>
      <style:text-properties fo:color="#272727" loext:opacity="100%" style:font-name="Cambria" fo:font-family="Cambria" style:font-family-generic="roman" style:font-pitch="variable" fo:font-size="10.5pt" fo:language="en" fo:country="US" style:font-name-asian="宋体" style:font-family-asian="宋体"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chapter">
      <style:paragraph-properties fo:margin-top="0.028in" fo:margin-bottom="0in" style:contextual-spacing="false" fo:keep-together="always" fo:orphans="2" fo:widows="2" fo:keep-with-next="always"/>
      <style:text-properties fo:color="#272727" loext:opacity="100%" style:font-name="Cambria" fo:font-family="Cambria" style:font-family-generic="roman" style:font-pitch="variable" fo:font-size="10.5pt" fo:language="en" fo:country="US" fo:font-style="italic" style:font-name-asian="宋体" style:font-family-asian="宋体"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class="chapter">
      <style:paragraph-properties fo:margin-left="0.372in" fo:margin-right="0.4425in" fo:margin-top="0.0598in" fo:margin-bottom="0in" style:contextual-spacing="false"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paragraph-properties fo:margin-left="0.0846in" fo:text-align="center" style:justify-single-word="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JRM_5f_Bodytext" style:display-name="JRM_Bodytext" style:family="paragraph" style:parent-style-name="Standard" style:auto-update="true">
      <style:paragraph-properties fo:margin-top="0in" fo:margin-bottom="0.0835in" style:contextual-spacing="false" fo:text-align="justify" style:justify-single-word="false" fo:orphans="2" fo:widows="2"/>
      <style:text-properties fo:color="#000000" loext:opacity="100%" fo:language="id" fo:country="ID" style:font-name-asian="Calibri2" style:font-family-asian="Calibri" style:font-family-generic-asian="system" style:font-pitch-asian="variable">
        <loext:char-complex-color loext:theme-type="dark1" loext:color-type="theme"/>
      </style:text-properties>
    </style:style>
    <style:style style:name="Para" style:family="paragraph" style:parent-style-name="Standard">
      <style:paragraph-properties fo:margin-top="0in" fo:margin-bottom="0.0835in" style:contextual-spacing="false" style:line-height-at-least="0.1665in" fo:text-align="justify" style:justify-single-word="false" fo:orphans="2" fo:widows="2" fo:text-indent="0.2in" style:auto-text-indent="false"/>
      <style:text-properties fo:color="#000000" loext:opacity="100%" fo:font-size="10pt" fo:language="en" fo:country="IN" style:font-name-asian="DengXian" style:font-family-asian="DengXian" style:font-family-generic-asian="system" style:font-pitch-asian="variable" style:font-size-asian="10pt" style:language-asian="en" style:country-asian="IN" style:font-name-complex="Minion Pro" style:font-family-complex="'Minion Pro'" style:font-family-generic-complex="system" style:font-pitch-complex="variable" style:font-size-complex="9.5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0pt" fo:font-weight="bold" style:font-name-asian="宋体" style:font-family-asian="宋体"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365f91" loext:opacity="100%" style:font-name="Cambria" fo:font-family="Cambria"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43f60" loext:opacity="100%" style:font-name="Cambria" fo:font-family="Cambria"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365f91" loext:opacity="100%" style:font-name="Cambria" fo:font-family="Cambria" style:font-family-generic="roman" style:font-pitch="variable" fo:font-size="10pt" fo:font-style="italic" style:font-name-asian="宋体" style:font-family-asian="宋体"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365f91" loext:opacity="100%" style:font-name="Cambria" fo:font-family="Cambria" style:font-family-generic="roman" style:font-pitch="variable" fo:font-size="10pt" style:font-name-asian="宋体" style:font-family-asian="宋体"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0pt" style:font-name-asian="宋体" style:font-family-asian="宋体"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243f60" loext:opacity="100%" style:font-name="Cambria" fo:font-family="Cambria" style:font-family-generic="roman" style:font-pitch="variable" fo:font-size="10pt" fo:font-style="italic" style:font-name-asian="宋体" style:font-family-asian="宋体"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mbria" fo:font-family="Cambria" style:font-family-generic="roman" style:font-pitch="variable" fo:font-size="10.5pt" style:font-name-asian="宋体" style:font-family-asian="宋体"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mbria" fo:font-family="Cambria" style:font-family-generic="roman" style:font-pitch="variable" fo:font-size="10.5pt" fo:font-style="italic" style:font-name-asian="宋体" style:font-family-asian="宋体"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28"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9" loext:num-list-format="%1%.%2%" style:num-format="1" text:display-levels="2">
        <style:list-level-properties text:list-level-position-and-space-mode="label-alignment">
          <style:list-level-label-alignment text:label-followed-by="listtab" fo:text-indent="-0.4in" fo:margin-left="1.1882in"/>
        </style:list-level-properties>
      </text:outline-level-style>
      <text:outline-level-style text:level="3" text:style-name="ListLabel_20_30"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31"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32"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right="-0.0008in">
        <style:tab-stops>
          <style:tab-stop style:position="5.1835in"/>
        </style:tab-stops>
      </style:paragraph-properties>
    </style:style>
    <style:style style:name="MP2" style:family="paragraph" style:parent-style-name="Frame_20_contents">
      <style:paragraph-properties fo:line-height="150%" fo:text-align="end" style:justify-single-word="false"/>
    </style:style>
    <style:style style:name="MP3" style:family="paragraph" style:parent-style-name="Frame_20_contents">
      <style:paragraph-properties fo:line-height="150%" fo:text-align="end" style:justify-single-word="false"/>
      <style:text-properties fo:color="#000000" loext:opacity="100%" style:font-name="Arial" fo:font-size="8pt" fo:font-style="italic" fo:font-weight="bold" style:font-size-asian="8pt" style:font-style-asian="italic" style:font-weight-asian="bold" style:font-name-complex="Arial1" style:font-size-complex="8pt" style:font-style-complex="italic" style:font-weight-complex="bold">
        <loext:char-complex-color loext:theme-type="dark1" loext:color-type="theme"/>
      </style:text-properties>
    </style:style>
    <style:style style:name="MP4" style:family="paragraph">
      <loext:graphic-properties draw:fill="none"/>
      <style:paragraph-properties fo:text-align="start"/>
      <style:text-properties fo:color="#ffffff" loext:opacity="100%" fo:font-size="18pt"/>
    </style:style>
    <style:style style:name="MP5" style:family="paragraph" style:parent-style-name="Header">
      <style:paragraph-properties fo:margin-right="-0.0008in">
        <style:tab-stops>
          <style:tab-stop style:position="3.1339in" style:type="center"/>
        </style:tab-stops>
      </style:paragraph-properties>
    </style:style>
    <style:style style:name="MP6" style:family="paragraph" style:parent-style-name="Header">
      <style:paragraph-properties>
        <style:tab-stops>
          <style:tab-stop style:position="3.1339in" style:type="center"/>
          <style:tab-stop style:position="6.7925in" style:type="right"/>
        </style:tab-stops>
      </style:paragraph-properties>
    </style:style>
    <style:style style:name="MP7" style:family="paragraph">
      <loext:graphic-properties draw:fill="none"/>
      <style:paragraph-properties fo:text-align="start"/>
      <style:text-properties fo:font-size="18pt"/>
    </style:style>
    <style:style style:name="MP8" style:family="paragraph" style:parent-style-name="Header">
      <style:paragraph-properties>
        <style:tab-stops>
          <style:tab-stop style:position="3.1339in" style:type="center"/>
          <style:tab-stop style:position="6.7925in" style:type="right"/>
        </style:tab-stops>
      </style:paragraph-properties>
      <style:text-properties style:font-name="Arial" fo:font-size="8pt" fo:language="en" fo:country="US" fo:font-weight="bold" style:font-size-asian="8pt" style:font-weight-asian="bold" style:font-name-complex="Arial1" style:font-size-complex="8pt" style:font-weight-complex="bold"/>
    </style:style>
    <style:style style:name="MP9" style:family="paragraph" style:parent-style-name="Footer">
      <style:paragraph-properties fo:text-align="center" style:justify-single-word="false"/>
      <style:text-properties fo:font-size="8pt" style:font-size-asian="8pt" style:font-size-complex="8pt"/>
    </style:style>
    <style:style style:name="MP10" style:family="paragraph" style:parent-style-name="Footer">
      <style:text-properties style:font-name="Arial" fo:font-size="8pt" fo:language="en" fo:country="US" fo:font-style="italic" fo:font-weight="bold" style:font-size-asian="8pt" style:font-style-asian="italic" style:font-weight-asian="bold" style:font-name-complex="Arial1" style:font-size-complex="8pt" style:font-style-complex="italic" style:font-weight-complex="bold"/>
    </style:style>
    <style:style style:name="MP11" style:family="paragraph" style:parent-style-name="Footer">
      <style:paragraph-properties fo:text-align="center" style:justify-single-word="false"/>
    </style:style>
    <style:style style:name="MT1" style:family="text">
      <style:text-properties style:font-name="Arial" fo:font-size="8pt" fo:language="en" fo:country="US" fo:font-style="italic" fo:font-weight="bold" style:font-size-asian="8pt" style:font-style-asian="italic" style:font-weight-asian="bold" style:font-name-complex="Arial1" style:font-size-complex="8pt" style:font-style-complex="italic" style:font-weight-complex="bold"/>
    </style:style>
    <style:style style:name="MT2" style:family="text">
      <style:text-properties fo:color="#000000" loext:opacity="100%" style:font-name="Arial" fo:font-size="8pt" fo:font-style="italic" fo:font-weight="bold" style:font-size-asian="8pt" style:font-style-asian="italic" style:font-weight-asian="bold" style:font-name-complex="Arial1" style:font-size-complex="8pt" style:font-style-complex="italic" style:font-weight-complex="bold">
        <loext:char-complex-color loext:theme-type="dark1" loext:color-type="theme"/>
      </style:text-properties>
    </style:style>
    <style:style style:name="MT3" style:family="text">
      <style:text-properties style:font-name="Arial" fo:font-size="8pt" fo:language="en" fo:country="US" fo:font-weight="bold" style:font-size-asian="8pt" style:font-weight-asian="bold" style:font-name-complex="Arial1" style:font-size-complex="8pt" style:font-weight-complex="bold"/>
    </style:style>
    <style:style style:name="MT4" style:family="text">
      <style:text-properties fo:font-size="8pt" style:font-size-asian="8pt" style:font-size-complex="8pt"/>
    </style:style>
    <style:style style:name="MT5" style:family="text">
      <style:text-properties fo:font-size="9pt" style:font-size-asian="9pt"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3.3598in, 0in, 1.4362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028in" svg:stroke-linecap="butt" draw:fill="none" loext:fill-use-slide-background="false" draw:textarea-vertical-align="middle" draw:auto-grow-height="false" fo:min-height="0.3425in" fo:min-width="1.709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417in" svg:stroke-color="#4f81bd" svg:stroke-linecap="butt" draw:fill="none" loext:fill-use-slide-background="false" draw:textarea-horizontal-align="center" draw:textarea-vertical-align="top" draw:auto-grow-height="false" fo:padding-top="0.0492in" fo:padding-bottom="0.0492in" fo:padding-left="0.0984in" fo:padding-right="0.0984in" fo:wrap-option="wrap" draw:shadow="visible" draw:shadow-offset-x="0in" draw:shadow-offset-y="0.0252in" draw:shadow-color="#000000" draw:shadow-opacity="35%" loext:shadow-blur="0.0437in" loext:decorative="false" fo:margin-left="0.0626in" fo:margin-right="0.0689in" fo:margin-top="0.0417in" fo:margin-bottom="0.1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page-layout style:name="Mpm1">
      <style:page-layout-properties fo:page-width="8.2681in" fo:page-height="11.6929in" style:num-format="1" style:print-orientation="portrait" fo:margin-top="0.2362in" fo:margin-bottom="0.2362in" fo:margin-left="0.9846in" fo:margin-right="0.7874in" style:writing-mode="lr-tb" style:layout-grid-color="#c0c0c0" style:layout-grid-lines="49"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18in" style:dynamic-spacing="true"/>
      </style:header-style>
      <style:footer-style>
        <style:header-footer-properties fo:min-height="0.3547in" fo:margin-left="0in" fo:margin-right="0in" fo:margin-top="0.31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17" draw:name="Rectangle 18" draw:style-name="Mgr1" draw:text-style-name="MP4" svg:width="1.7087in" svg:height="0.3421in" svg:x="4.7217in" svg:y="0.1043in"><text:p text:style-name="MP2" loext:marker-style-name="MT2"><text:span text:style-name="MT2">Vol. X, No. X, 202X</text:span><text:span text:style-name="MT2"/></text:p><text:p text:style-name="MP2" loext:marker-style-name="MT2"><text:span text:style-name="MT2">ISSN 2987-7822 (Online)</text:span><text:span text:style-name="MT2"/></text:p><text:p text:style-name="MP3" loext:marker-style-name="MT2"/><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6" text:anchor-type="char" svg:x="0.0457in" svg:y="0.0173in" svg:width="1.2339in" svg:height="0.4756in" draw:z-index="5"><draw:image xlink:href="Pictures/1000000100000A5100000190D6E17FD2.png" xlink:type="simple" xlink:show="embed" xlink:actuate="onLoad" draw:mime-type="image/png"/><svg:desc>A blue and white sign

Description automatically generated</svg:desc></draw:frame><text:span text:style-name="MT1"><text:tab/></text:span><text:span text:style-name="MT1"/></text:p>
        <text:p text:style-name="MP5" loext:marker-style-name="MT1"><text:span text:style-name="MT3"><text:tab/><text:tab/> <text:s text:c="53"/></text:span><text:span text:style-name="MT1"/></text:p>
        <text:p text:style-name="MP6" loext:marker-style-name="MT3"><draw:line text:anchor-type="char" draw:z-index="11" draw:name="Straight Connector 17" draw:style-name="Mgr2" draw:text-style-name="MP7" svg:x1="0.0276in" svg:y1="0.252in" svg:x2="6.585in" svg:y2="0.2524in"><text:p/></draw:line><text:span text:style-name="MT3"><text:s text:c="59"/></text:span><text:span text:style-name="MT3"/></text:p>
        <text:p text:style-name="MP8" loext:marker-style-name="MT3"/>
        <text:p text:style-name="MP8" loext:marker-style-name="MT3"/>
      </style:header>
      <style:footer>
        <text:p text:style-name="MP9" loext:marker-style-name="MT4"><draw:line text:anchor-type="char" draw:z-index="23" draw:name="Straight Connector 17" draw:style-name="Mgr2" draw:text-style-name="MP7" svg:x1="-0.05in" svg:y1="0.1059in" svg:x2="6.5067in" svg:y2="0.1063in"><text:p/></draw:line></text:p>
        <text:p text:style-name="MP10" loext:marker-style-name="MT1"/>
        <text:p text:style-name="Footer" loext:marker-style-name="MT5"><text:span text:style-name="MT1">……………….., et al</text:span><text:span text:style-name="MT3"> <text:tab/> <text:s text:c="166"/></text:span><text:span text:style-name="MT5"><text:page-number text:select-page="current">1</text:page-number></text:span></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ismail - [2010]</meta:initial-creator>
    <dc:creator>Yohanes Arissaputra</dc:creator>
    <meta:editing-cycles>4</meta:editing-cycles>
    <meta:creation-date>2025-06-19T06:42:00</meta:creation-date>
    <dc:date>2025-06-19T06:53:00</dc:date>
    <meta:editing-duration>PT3M</meta:editing-duration>
    <meta:generator>LibreOffice/25.2.3.2$Linux_X86_64 LibreOffice_project/bbb074479178df812d175f709636b368952c2ce3</meta:generator>
    <meta:document-statistic meta:table-count="1" meta:image-count="19" meta:object-count="0" meta:page-count="6" meta:paragraph-count="93" meta:word-count="1934" meta:character-count="14022" meta:non-whitespace-character-count="11846"/>
    <meta:user-defined meta:name="AppVersion">16.0000</meta:user-defined>
    <meta:user-defined meta:name="Created" meta:value-type="date">2021-10-29T00:00:00</meta:user-defined>
    <meta:user-defined meta:name="Creator">Microsoft® Word 2010</meta:user-defined>
    <meta:user-defined meta:name="LastSaved" meta:value-type="date">2022-12-06T00:00:00</meta:user-defined>
    <meta:template xlink:type="simple" xlink:actuate="onRequest" xlink:title="Normal" xlink:href=""/>
  </office:meta>
</office:document-meta>
</file>